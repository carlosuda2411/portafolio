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justify" fo:text-align-last="star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1565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solid" draw:fill-color="#1565a7" draw:opacity="100%" draw:stroke="solid" svg:stroke-width="0.01389in" svg:stroke-color="#1565a7" svg:stroke-opacity="100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solid" draw:fill-color="#f5a623" draw:opacity="100%" draw:stroke="solid" svg:stroke-width="0.01389in" svg:stroke-color="#f5a623" svg:stroke-opacity="100%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solid" draw:fill-color="#d94f3d" draw:opacity="100%" draw:stroke="solid" svg:stroke-width="0.01389in" svg:stroke-color="#d94f3d" svg:stroke-opacity="100%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mbria" style:font-family-asian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solid" draw:fill-color="#2e8b57" draw:opacity="100%" draw:stroke="solid" svg:stroke-width="0.01389in" svg:stroke-color="#2e8b57" svg:stroke-opacity="100%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generic="swiss" style:font-family-generic-asian="swiss" style:font-pitch="variable" style:font-pitch-asian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non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b7a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b7a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draw:fill="none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solid" draw:fill-color="#f5a623" draw:opacity="100%" draw:stroke="solid" svg:stroke-width="0.01389in" svg:stroke-color="#f5a623" svg:stroke-opacity="100%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solid" draw:fill-color="#f5a623" draw:opacity="100%" draw:stroke="solid" svg:stroke-width="0.01389in" svg:stroke-color="#f5a623" svg:stroke-opacity="100%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solid" draw:fill-color="#1b3a5c" draw:opacity="100%" draw:stroke="solid" svg:stroke-width="0.01389in" svg:stroke-color="#1b3a5c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5a62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f5a623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a0b4c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solid" draw:fill-color="#f5a623" draw:opacity="100%" draw:stroke="solid" svg:stroke-width="0.01389in" svg:stroke-color="#f5a623" svg:stroke-opacity="100%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5a623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solid" draw:fill-color="#1565a7" draw:opacity="100%" draw:stroke="solid" svg:stroke-width="0.01389in" svg:stroke-color="#1565a7" svg:stroke-opacity="100%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5">
      <style:graphic-properties fo:wrap-option="wrap" fo:padding-top="0.05in" fo:padding-bottom="0.05in" fo:padding-left="0.1in" fo:padding-right="0.1in" draw:textarea-vertical-align="top" draw:textarea-horizontal-align="left" draw:fill="solid" draw:fill-color="#d94f3d" draw:opacity="100%" draw:stroke="solid" svg:stroke-width="0.01389in" svg:stroke-color="#d94f3d" svg:stroke-opacity="100%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d94f3d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3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3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3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.05in" fo:padding-bottom="0.05in" fo:padding-left="0.1in" fo:padding-right="0.1in" draw:textarea-vertical-align="top" draw:textarea-horizontal-align="left" draw:fill="solid" draw:fill-color="#2e8b57" draw:opacity="100%" draw:stroke="solid" svg:stroke-width="0.01389in" svg:stroke-color="#2e8b57" svg:stroke-opacity="100%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graphic" style:name="a3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1565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3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solid" draw:fill-color="#f5a623" draw:opacity="100%" draw:stroke="solid" svg:stroke-width="0.01389in" svg:stroke-color="#f5a623" svg:stroke-opacity="100%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5a623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b7a75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d94f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f5a623" style:text-line-through-type="none" style:text-line-through-style="none" style:text-line-through-width="auto" style:text-line-through-color="font-color" style:text-position="0% 100%" fo:font-family="Cambria" style:font-family-asian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draw:fill="none" draw:stroke="non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2">
      <style:drawing-page-properties draw:fill="solid" draw:fill-color="#0d1b2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d94f3d" svg:stroke-opacity="100%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draw:fill="none" draw:stroke="non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b7a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draw:fill="none" draw:stroke="non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solid" draw:fill-color="#f5a623" draw:opacity="100%" draw:stroke="solid" svg:stroke-width="0.01389in" svg:stroke-color="#f5a623" svg:stroke-opacity="100%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d6e8f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solid" draw:fill-color="#f5a623" draw:opacity="100%" draw:stroke="solid" svg:stroke-width="0.01389in" svg:stroke-color="#f5a623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 style:parent-style-name="Graphics">
      <style:graphic-properties draw:fill="none" draw:stroke="non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solid" draw:fill-color="#d94f3d" draw:opacity="100%" draw:stroke="solid" svg:stroke-width="0.01389in" svg:stroke-color="#d94f3d" svg:stroke-opacity="100%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5">
      <style:graphic-properties/>
    </style:style>
    <style:style style:family="text" style:name="a82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d6e8f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solid" draw:fill-color="#1565a7" draw:opacity="100%" draw:stroke="solid" svg:stroke-width="0.01389in" svg:stroke-color="#1565a7" svg:stroke-opacity="100%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0d1b2a" svg:stroke-opacity="100%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d6e8f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solid" draw:fill-color="#1565a7" draw:opacity="100%" draw:stroke="solid" svg:stroke-width="0.01389in" svg:stroke-color="#1565a7" svg:stroke-opacity="100%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8">
      <style:graphic-properties fo:wrap-option="wrap" fo:padding-top="0.05in" fo:padding-bottom="0.05in" fo:padding-left="0.1in" fo:padding-right="0.1in" draw:textarea-vertical-align="top" draw:textarea-horizontal-align="left" draw:fill="solid" draw:fill-color="#1b3a5c" draw:opacity="100%" draw:stroke="solid" svg:stroke-width="0.01389in" svg:stroke-color="#1b3a5c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graphic" style:name="a10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0d1b2a" svg:stroke-opacity="100%" draw:auto-grow-width="false" draw:auto-grow-height="false"/>
      <style:paragraph-properties style:font-independent-line-spacing="true" style:writing-mode="lr-tb"/>
    </style:style>
    <style:style style:family="graphic" style:name="a2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solid" draw:fill-color="#1b3a5c" draw:opacity="100%" draw:stroke="solid" svg:stroke-width="0.01389in" svg:stroke-color="#1b3a5c" svg:stroke-opacity="100%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d6e8f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auto-grow-width="false" draw:auto-grow-height="false"/>
      <style:paragraph-properties style:font-independent-line-spacing="true" style:writing-mode="lr-tb"/>
    </style:style>
    <style:style style:family="graphic" style:name="a1379">
      <style:graphic-properties fo:wrap-option="wrap" fo:padding-top="0.05in" fo:padding-bottom="0.05in" fo:padding-left="0.1in" fo:padding-right="0.1in" draw:textarea-vertical-align="top" draw:textarea-horizontal-align="left" draw:fill="solid" draw:fill-color="#64748b" draw:opacity="100%" draw:stroke="solid" svg:stroke-width="0.01389in" svg:stroke-color="#64748b" svg:stroke-opacity="100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0d1b2a" svg:stroke-opacity="100%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5in" fo:padding-bottom="0.05in" fo:padding-left="0.1in" fo:padding-right="0.1in" draw:textarea-vertical-align="top" draw:textarea-horizontal-align="left" draw:fill="solid" draw:fill-color="#d94f3d" draw:opacity="100%" draw:stroke="solid" svg:stroke-width="0.01389in" svg:stroke-color="#d94f3d" svg:stroke-opacity="100%" draw:auto-grow-width="false" draw:auto-grow-height="false"/>
      <style:paragraph-properties style:font-independent-line-spacing="true" style:writing-mode="lr-tb"/>
    </style:style>
    <style:style style:family="graphic" style:name="a10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d94f3d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0d1b2a" svg:stroke-opacity="100%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solid" draw:fill-color="#d94f3d" draw:opacity="100%" draw:stroke="solid" svg:stroke-width="0.01389in" svg:stroke-color="#d94f3d" svg:stroke-opacity="100%" draw:auto-grow-width="false" draw:auto-grow-height="false"/>
      <style:paragraph-properties style:font-independent-line-spacing="true" style:writing-mode="lr-tb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d94f3d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d6e8f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0d1b2a" svg:stroke-opacity="100%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2e8b57" draw:opacity="100%" draw:stroke="solid" svg:stroke-width="0.01389in" svg:stroke-color="#2e8b57" svg:stroke-opacity="100%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b7a75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solid" draw:fill-color="#d94f3d" draw:opacity="20%" draw:stroke="solid" svg:stroke-width="0.01389in" svg:stroke-color="#d94f3d" svg:stroke-opacity="40%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draw:fill="none" draw:stroke="non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solid" draw:fill-color="#d94f3d" draw:opacity="100%" draw:stroke="solid" svg:stroke-width="0.01389in" svg:stroke-color="#d94f3d" svg:stroke-opacity="100%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d94f3d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b7a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.05in" fo:padding-left="0.1in" fo:padding-right="0.1in" draw:textarea-vertical-align="top" draw:textarea-horizontal-align="left" draw:fill="solid" draw:fill-color="#f5a623" draw:opacity="100%" draw:stroke="solid" svg:stroke-width="0.01389in" svg:stroke-color="#f5a623" svg:stroke-opacity="100%" draw:auto-grow-width="false" draw:auto-grow-height="fals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solid" draw:fill-color="#2e8b57" draw:opacity="100%" draw:stroke="solid" svg:stroke-width="0.01389in" svg:stroke-color="#2e8b57" svg:stroke-opacity="100%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5a623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5a623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4" style:parent-style-name="Graphics">
      <style:graphic-properties draw:fill="none" draw:stroke="none"/>
    </style:style>
    <style:style style:family="text" style:name="a27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5a623" style:text-line-through-type="none" style:text-line-through-style="none" style:text-line-through-width="auto" style:text-line-through-color="font-color" style:text-position="0% 100%" fo:font-family="Cambria" style:font-family-asian="Cambri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f5a623" style:text-line-through-type="none" style:text-line-through-style="none" style:text-line-through-width="auto" style:text-line-through-color="font-color" style:text-position="0% 100%" fo:font-family="Cambria" style:font-family-asian="Cambria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d94f3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" style:parent-style-name="Graphics">
      <style:graphic-properties draw:fill="none" draw:stroke="none" draw:image-opacity="100%"/>
    </style:style>
    <style:style style:family="presentation" style:name="a32">
      <style:graphic-properties draw:fill="none" draw:stroke="none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solid" draw:fill-color="#1b3a5c" draw:opacity="100%" draw:stroke="solid" svg:stroke-width="0.01389in" svg:stroke-color="#1b3a5c" svg:stroke-opacity="100%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solid" draw:fill-color="#1b3a5c" draw:opacity="100%" draw:stroke="solid" svg:stroke-width="0.01389in" svg:stroke-color="#1b3a5c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solid" draw:fill-color="#1565a7" draw:opacity="100%" draw:stroke="solid" svg:stroke-width="0.01389in" svg:stroke-color="#1565a7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solid" draw:fill-color="#2e8b57" draw:opacity="100%" draw:stroke="solid" svg:stroke-width="0.01389in" svg:stroke-color="#2e8b57" svg:stroke-opacity="100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solid" draw:fill-color="#f5a623" draw:opacity="100%" draw:stroke="solid" svg:stroke-width="0.01389in" svg:stroke-color="#f5a623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solid" draw:fill-color="#0b7a75" draw:opacity="100%" draw:stroke="solid" svg:stroke-width="0.01389in" svg:stroke-color="#0b7a75" svg:stroke-opacity="100%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draw:fill="none" draw:stroke="non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389in" svg:stroke-color="#d94f3d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draw:fill="none" draw:stroke="non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solid" draw:fill-color="#f5a623" draw:opacity="100%" draw:stroke="solid" svg:stroke-width="0.01389in" svg:stroke-color="#f5a623" svg:stroke-opacity="100%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solid" draw:fill-color="#d94f3d" draw:opacity="100%" draw:stroke="solid" svg:stroke-width="0.01389in" svg:stroke-color="#d94f3d" svg:stroke-opacity="100%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d94f3d" style:text-line-through-type="none" style:text-line-through-style="none" style:text-line-through-width="auto" style:text-line-through-color="font-color" style:text-position="0% 100%" fo:font-family="Cambria" style:font-family-asian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d94f3d" style:text-line-through-type="none" style:text-line-through-style="none" style:text-line-through-width="auto" style:text-line-through-color="font-color" style:text-position="0% 100%" fo:font-family="Cambria" style:font-family-asian="Cambria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solid" draw:fill-color="#f4f8fc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solid" draw:fill-color="#1b3a5c" draw:opacity="100%" draw:stroke="solid" svg:stroke-width="0.01389in" svg:stroke-color="#1b3a5c" svg:stroke-opacity="100%" draw:auto-grow-width="false" draw:auto-grow-height="false"/>
      <style:paragraph-properties style:font-independent-line-spacing="true" style:writing-mode="lr-tb"/>
    </style:style>
    <style:style style:family="graphic" style:name="a7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left" draw:fill="solid" draw:fill-color="#64748b" draw:opacity="100%" draw:stroke="solid" svg:stroke-width="0.01389in" svg:stroke-color="#64748b" svg:stroke-opacity="100%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solid" draw:fill-color="#2e8b57" draw:opacity="100%" draw:stroke="solid" svg:stroke-width="0.01389in" svg:stroke-color="#2e8b57" svg:stroke-opacity="100%" draw:auto-grow-width="false" draw:auto-grow-height="false"/>
      <style:paragraph-properties style:font-independent-line-spacing="true" style:writing-mode="lr-tb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solid" draw:fill-color="#1b3a5c" draw:opacity="100%" draw:stroke="solid" svg:stroke-width="0.01389in" svg:stroke-color="#1b3a5c" svg:stroke-opacity="100%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justify" fo:text-align-last="star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1b3a5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2e8b57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 style:parent-style-name="Graphics">
      <style:graphic-properties draw:fill="none" draw:stroke="non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draw:fill="none" draw:stroke="non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justify" fo:text-align-last="star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647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justify" fo:text-align-last="star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solid" draw:fill-color="#e8eff6" draw:opacity="100%" draw:stroke="solid" svg:stroke-width="0.01389in" svg:stroke-color="#e8eff6" svg:stroke-opacity="100%" draw:shadow="visible" draw:shadow-offset-x="-0.02946in" draw:shadow-offset-y="0.02946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solid" draw:fill-color="#1565a7" draw:opacity="100%" draw:stroke="solid" svg:stroke-width="0.01389in" svg:stroke-color="#1565a7" svg:stroke-opacity="100%" draw:auto-grow-width="false" draw:auto-grow-height="false"/>
      <style:paragraph-properties style:font-independent-line-spacing="true" style:writing-mode="lr-tb"/>
    </style:style>
    <style:style style:family="graphic" style:name="a1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2e8f0" svg:stroke-opacity="100%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a0b4c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</office:automatic-styles>
  <office:body>
    <office:presentation>
      <draw:page draw:name="Slide14" draw:style-name="a22" draw:master-page-name="Master1-Layout2-title-Title-slide" presentation:presentation-page-layout-name="Master1-PPL2" draw:id="Slide-269">
        <draw:frame draw:id="id5" presentation:style-name="a26" draw:name="Google Shape;62;p13" svg:x="3.32972in" svg:y="1.57946in" svg:width="3.34055in" svg:height="1.6811in" presentation:class="title" presentation:placeholder="false">
          <draw:text-box>
            <text:p text:style-name="a25" text:class-names="" text:cond-style-name=""><text:span text:style-name="a23" text:class-names="">Project beijing</text:span><text:span text:style-name="a24" text:class-names=""/></text:p>
          </draw:text-box>
          <svg:title/>
          <svg:desc/>
        </draw:frame>
        <draw:frame draw:id="id6" presentation:style-name="a30" draw:name="Google Shape;63;p13" svg:x="3.32972in" svg:y="3.40833in" svg:width="3.34055in" svg:height="0.76706in" presentation:class="subtitle" presentation:placeholder="false">
          <draw:text-box>
            <text:p text:style-name="a29" text:class-names="" text:cond-style-name=""><text:span text:style-name="a27" text:class-names="">Equipo Rojo</text:span><text:span text:style-name="a28" text:class-names=""/></text:p>
          </draw:text-box>
          <svg:title/>
          <svg:desc/>
        </draw:frame>
        <draw:frame draw:id="id7" draw:style-name="a31" draw:name="Google Shape;64;p13" svg:x="0in" svg:y="0in" svg:width="10in" svg:height="5.6385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34">
          <draw:page-thumbnail draw:page-number="1" svg:x="0.41667in" svg:y="0.75in" svg:width="6.66667in" svg:height="3.75in" presentation:class="page" draw:id="id8" presentation:style-name="a32" draw:name="Google Shape;59;p:notes">
            <svg:title/>
            <svg:desc/>
          </draw:page-thumbnail>
          <draw:frame draw:id="id9" presentation:style-name="a33" draw:name="Google Shape;60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 2" draw:style-name="a35" draw:master-page-name="Master1-Layout1-cust-DEFAULT" presentation:presentation-page-layout-name="Master1-PPL1" draw:id="Slide-257">
        <draw:custom-shape svg:x="9.3in" svg:y="5.2in" svg:width="0.5in" svg:height="0.25in" draw:id="id10" draw:style-name="a38" draw:name="Text 0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3in" svg:width="9in" svg:height="0.55in" draw:id="id11" draw:style-name="a42" draw:name="Text 1">
          <svg:title/>
          <svg:desc/>
          <text:p text:style-name="a41" text:class-names="" text:cond-style-name=""><text:span text:style-name="a39" text:class-names="">Estructura de la exposición</text:span><text:span text:style-name="a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15in" svg:width="1.65in" svg:height="3.6in" draw:id="id12" draw:style-name="a45" draw:name="Shape 2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15in" svg:width="1.65in" svg:height="0.8in" draw:id="id13" draw:style-name="a49" draw:name="Text 3">
          <svg:title/>
          <svg:desc/>
          <text:p text:style-name="a48" text:class-names="" text:cond-style-name=""><text:span text:style-name="a46" text:class-names="">01</text:span><text:span text:style-name="a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48889in" svg:width="1.45in" svg:height="1.6in" draw:id="id14" draw:style-name="a53" draw:name="Text 4">
          <svg:title/>
          <svg:desc/>
          <text:p text:style-name="a52" text:class-names="" text:cond-style-name=""><text:span text:style-name="a50" text:class-names="">Contexto y objetivos</text:span><text:span text:style-name="a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2in" svg:y="1.15in" svg:width="1.65in" svg:height="3.6in" draw:id="id15" draw:style-name="a56" draw:name="Shape 7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2in" svg:y="2.15in" svg:width="1.65in" svg:height="0.8in" draw:id="id16" draw:style-name="a60" draw:name="Text 8">
          <svg:title/>
          <svg:desc/>
          <text:p text:style-name="a59" text:class-names="" text:cond-style-name=""><text:span text:style-name="a57" text:class-names="">02</text:span><text:span text:style-name="a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2in" svg:y="2.48889in" svg:width="1.45in" svg:height="1.6in" draw:id="id17" draw:style-name="a64" draw:name="Text 9">
          <svg:title/>
          <svg:desc/>
          <text:p text:style-name="a63" text:class-names="" text:cond-style-name=""><text:span text:style-name="a61" text:class-names="">Diagnóstico inicial</text:span><text:span text:style-name="a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4in" svg:y="1.15in" svg:width="1.65in" svg:height="3.6in" draw:id="id18" draw:style-name="a67" draw:name="Shape 12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4in" svg:y="2.15in" svg:width="1.65in" svg:height="0.8in" draw:id="id19" draw:style-name="a71" draw:name="Text 13">
          <svg:title/>
          <svg:desc/>
          <text:p text:style-name="a70" text:class-names="" text:cond-style-name=""><text:span text:style-name="a68" text:class-names="">03</text:span><text:span text:style-name="a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2in" svg:y="2.6in" svg:width="1.45in" svg:height="1.6in" draw:id="id20" draw:style-name="a75" draw:name="Text 14">
          <svg:title/>
          <svg:desc/>
          <text:p text:style-name="a74" text:class-names="" text:cond-style-name=""><text:span text:style-name="a72" text:class-names="">Análisis de patrones y causas</text:span><text:span text:style-name="a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9in" svg:y="4.1in" svg:width="1.15in" svg:height="0.38in" draw:id="id21" draw:style-name="a78" draw:name="Text 16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6in" svg:y="1.15in" svg:width="1.65in" svg:height="3.6in" draw:id="id22" draw:style-name="a81" draw:name="Shape 17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6in" svg:y="2.15in" svg:width="1.65in" svg:height="0.8in" draw:id="id23" draw:style-name="a85" draw:name="Text 18">
          <svg:title/>
          <svg:desc/>
          <text:p text:style-name="a84" text:class-names="" text:cond-style-name=""><text:span text:style-name="a82" text:class-names="">04</text:span><text:span text:style-name="a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4in" svg:y="2.6in" svg:width="1.45in" svg:height="1.6in" draw:id="id24" draw:style-name="a89" draw:name="Text 19">
          <svg:title/>
          <svg:desc/>
          <text:p text:style-name="a88" text:class-names="" text:cond-style-name=""><text:span text:style-name="a86" text:class-names="">Medidas de política pública</text:span><text:span text:style-name="a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1in" svg:y="4.1in" svg:width="1.15in" svg:height="0.38in" draw:id="id25" draw:style-name="a92" draw:name="Text 21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8in" svg:y="1.15in" svg:width="1.65in" svg:height="3.6in" draw:id="id26" draw:style-name="a95" draw:name="Shape 22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8in" svg:y="2.15in" svg:width="1.65in" svg:height="0.8in" draw:id="id27" draw:style-name="a99" draw:name="Text 23">
          <svg:title/>
          <svg:desc/>
          <text:p text:style-name="a98" text:class-names="" text:cond-style-name=""><text:span text:style-name="a96" text:class-names="">05</text:span><text:span text:style-name="a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8in" svg:y="2.6in" svg:width="1.45in" svg:height="1.6in" draw:id="id28" draw:style-name="a103" draw:name="Text 24">
          <svg:title/>
          <svg:desc/>
          <text:p text:style-name="a102" text:class-names="" text:cond-style-name=""><text:span text:style-name="a100" text:class-names="">Conclusiones y priorización</text:span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3in" svg:y="4.1in" svg:width="1.15in" svg:height="0.38in" draw:id="id29" draw:style-name="a106" draw:name="Text 26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2">
          <draw:page-thumbnail draw:page-number="2" svg:x="0in" svg:y="0in" svg:width="0in" svg:height="0in" presentation:class="page" draw:id="id30" presentation:style-name="a107" draw:name="Slide Image Placeholder 1">
            <svg:title/>
            <svg:desc/>
          </draw:page-thumbnail>
          <draw:frame draw:id="id31" presentation:style-name="a108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32" presentation:style-name="a111" draw:name="Slide Number Placeholder 3" svg:x="0in" svg:y="0in" svg:width="0in" svg:height="0in" presentation:class="page-number" presentation:placeholder="false">
            <draw:text-box>
              <text:p text:style-name="a110" text:class-names="" text:cond-style-name=""><text:span text:style-name="a109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 3" draw:style-name="a113" draw:master-page-name="Master1-Layout1-cust-DEFAULT" presentation:presentation-page-layout-name="Master1-PPL1" draw:id="Slide-258">
        <draw:custom-shape svg:x="9.3in" svg:y="5.2in" svg:width="0.5in" svg:height="0.25in" draw:id="id33" draw:style-name="a116" draw:name="Text 0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8in" svg:width="1.4in" svg:height="0.28in" draw:id="id34" draw:style-name="a119" draw:name="Shape 1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7in" svg:width="1.4in" svg:height="0.28in" draw:id="id35" draw:style-name="a123" draw:name="Text 2">
          <svg:title/>
          <svg:desc/>
          <text:p text:style-name="a122" text:class-names="" text:cond-style-name=""><text:span text:style-name="a120" text:class-names="">01 · CONTEXTO</text:span><text:span text:style-name="a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24081in" svg:width="5.5in" svg:height="3.58075in" draw:id="id36" draw:style-name="a144" draw:name="Text 4">
          <svg:title/>
          <svg:desc/>
          <text:list text:style-name="a128">
            <text:list-item>
              <text:p text:style-name="a127" text:class-names="" text:cond-style-name=""><text:span text:style-name="a124" text:class-names="">Datasets:</text:span><text:span text:style-name="a125" text:class-names=""><text:s text:c="1"/>12 estaciones de monitoreo, 420.000+ registros horarios (2013–2017)</text:span><text:span text:style-name="a126" text:class-names=""/></text:p>
            </text:list-item>
          </text:list>
          <text:list text:style-name="a133">
            <text:list-item>
              <text:p text:style-name="a132" text:class-names="" text:cond-style-name=""><text:span text:style-name="a129" text:class-names="">Variables:<text:s text:c="1"/></text:span><text:span text:style-name="a130" text:class-names="">PM2.5, PM10, SO₂, NO₂, CO, O₃ + meteorología (temp, lluvia, viento)</text:span><text:span text:style-name="a131" text:class-names=""/></text:p>
            </text:list-item>
          </text:list>
          <text:list text:style-name="a139">
            <text:list-item>
              <text:p text:style-name="a138" text:class-names="" text:cond-style-name=""><text:span text:style-name="a134" text:class-names="">Beijing registra niveles de PM2.5 históricos por encima del umbral establecido en China (</text:span><text:span text:style-name="a135" text:class-names="">GB 3095-2012) para la fecha de<text:s text:c="1"/></text:span><text:span text:style-name="a136" text:class-names=""> 75 µg/m³ diario (25 µg/m³ diario en la OMS)</text:span><text:span text:style-name="a137" text:class-names=""/></text:p>
            </text:list-item>
          </text:list>
          <text:list text:style-name="a143">
            <text:list-item>
              <text:p text:style-name="a142" text:class-names="" text:cond-style-name=""><text:span text:style-name="a140" text:class-names="">La contaminación atmosférica es la mayor causa de mortalidad prematura evitable</text:span><text:span text:style-name="a14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in" svg:y="0.91538in" svg:width="3.1in" svg:height="1.1in" draw:id="id37" draw:style-name="a147" draw:name="Shape 5">
          <svg:title/>
          <svg:desc/>
          <text:p text:style-name="a146" text:class-names="" text:cond-style-name=""><text:span text:style-name="a1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0.96538in" svg:width="3in" svg:height="0.55in" draw:id="id38" draw:style-name="a151" draw:name="Text 6">
          <svg:title/>
          <svg:desc/>
          <text:p text:style-name="a150" text:class-names="" text:cond-style-name=""><text:span text:style-name="a148" text:class-names="">420K+</text:span><text:span text:style-name="a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1.51538in" svg:width="3in" svg:height="0.3in" draw:id="id39" draw:style-name="a157" draw:name="Text 7">
          <svg:title/>
          <svg:desc/>
          <text:p text:style-name="a156" text:class-names="" text:cond-style-name=""><text:span text:style-name="a152" text:class-names="">Registros</text:span><text:span text:style-name="a153" text:class-names=""><text:s text:c="1"/></text:span><text:span text:style-name="a154" text:class-names="">horarios</text:span><text:span text:style-name="a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in" svg:y="2.26538in" svg:width="3.1in" svg:height="1.1in" draw:id="id40" draw:style-name="a160" draw:name="Shape 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2.31538in" svg:width="3in" svg:height="0.55in" draw:id="id41" draw:style-name="a166" draw:name="Text 9">
          <svg:title/>
          <svg:desc/>
          <text:p text:style-name="a165" text:class-names="" text:cond-style-name=""><text:span text:style-name="a161" text:class-names="">75</text:span><text:span text:style-name="a162" text:class-names=""><text:s text:c="1"/></text:span><text:span text:style-name="a163" text:class-names="">µg/m³</text:span><text:span text:style-name="a1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2.86538in" svg:width="3in" svg:height="0.3in" draw:id="id42" draw:style-name="a176" draw:name="Text 10">
          <svg:title/>
          <svg:desc/>
          <text:p text:style-name="a175" text:class-names="" text:cond-style-name=""><text:span text:style-name="a167" text:class-names="">Limite</text:span><text:span text:style-name="a168" text:class-names=""><text:s text:c="1"/>PM 2.5<text:s text:c="1"/></text:span><text:span text:style-name="a169" text:class-names="">establecido</text:span><text:span text:style-name="a170" text:class-names=""><text:s text:c="1"/></text:span><text:span text:style-name="a171" text:class-names="">en</text:span><text:span text:style-name="a172" text:class-names=""><text:s text:c="1"/>China para la<text:s text:c="1"/></text:span><text:span text:style-name="a173" text:class-names="">fecha</text:span><text:span text:style-name="a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in" svg:y="3.61538in" svg:width="3.1in" svg:height="1.1in" draw:id="id43" draw:style-name="a179" draw:name="Shape 11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3.66538in" svg:width="3in" svg:height="0.55in" draw:id="id44" draw:style-name="a183" draw:name="Text 12">
          <svg:title/>
          <svg:desc/>
          <text:p text:style-name="a182" text:class-names="" text:cond-style-name=""><text:span text:style-name="a180" text:class-names="">5 años</text:span><text:span text:style-name="a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4.21538in" svg:width="3in" svg:height="0.3in" draw:id="id45" draw:style-name="a187" draw:name="Text 13">
          <svg:title/>
          <svg:desc/>
          <text:p text:style-name="a186" text:class-names="" text:cond-style-name=""><text:span text:style-name="a184" text:class-names="">de datos (2013–2017)</text:span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95in" svg:width="9in" svg:height="0.04in" draw:id="id46" draw:style-name="a190" draw:name="Shape 14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5.05in" svg:width="9in" svg:height="0.35in" draw:id="id47" draw:style-name="a194" draw:name="Text 15">
          <svg:title/>
          <svg:desc/>
          <text:p text:style-name="a193" text:class-names="" text:cond-style-name=""><text:span text:style-name="a191" text:class-names="">Objetivo: identificar fuentes de emisión, patrones temporales y simular impacto de medidas de reducción del tráfico</text:span><text:span text:style-name="a1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91562in" svg:width="9in" svg:height="0.55in" draw:id="id48" draw:style-name="a197" draw:name="Text 3">
          <svg:title/>
          <svg:desc/>
          <text:p text:style-name="a196" text:class-names="" text:cond-style-name=""><text:span text:style-name="a195" text:class-names="">Información general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03">
          <draw:page-thumbnail draw:page-number="3" svg:x="0in" svg:y="0in" svg:width="0in" svg:height="0in" presentation:class="page" draw:id="id49" presentation:style-name="a198" draw:name="Slide Image Placeholder 1">
            <svg:title/>
            <svg:desc/>
          </draw:page-thumbnail>
          <draw:frame draw:id="id50" presentation:style-name="a199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51" presentation:style-name="a202" draw:name="Slide Number Placeholder 3" svg:x="0in" svg:y="0in" svg:width="0in" svg:height="0in" presentation:class="page-number" presentation:placeholder="false">
            <draw:text-box>
              <text:p text:style-name="a201" text:class-names="" text:cond-style-name=""><text:span text:style-name="a200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 4" draw:style-name="a204" draw:master-page-name="Master1-Layout1-cust-DEFAULT" presentation:presentation-page-layout-name="Master1-PPL1" draw:id="Slide-259">
        <draw:custom-shape svg:x="9.3in" svg:y="5.2in" svg:width="0.5in" svg:height="0.25in" draw:id="id52" draw:style-name="a207" draw:name="Text 0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8in" svg:width="1.4in" svg:height="0.28in" draw:id="id53" draw:style-name="a210" draw:name="Shape 1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7in" svg:width="1.4in" svg:height="0.28in" draw:id="id54" draw:style-name="a214" draw:name="Text 2">
          <svg:title/>
          <svg:desc/>
          <text:p text:style-name="a213" text:class-names="" text:cond-style-name=""><text:span text:style-name="a211" text:class-names="">02 · DIAGNÓSTICO</text:span><text:span text:style-name="a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65in" svg:width="9in" svg:height="0.55in" draw:id="id55" draw:style-name="a218" draw:name="Text 3">
          <svg:title/>
          <svg:desc/>
          <text:p text:style-name="a217" text:class-names="" text:cond-style-name=""><text:span text:style-name="a215" text:class-names="">PM2.5 promedio por estación (2013–2017)</text:span><text:span text:style-name="a2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1.35in" svg:width="2.75in" svg:height="1.1in" draw:id="id56" draw:style-name="a221" draw:name="Shape 4">
          <svg:title/>
          <svg:desc/>
          <text:p text:style-name="a220" text:class-names="" text:cond-style-name=""><text:span text:style-name="a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1.35in" svg:width="0.12in" svg:height="1.1in" draw:id="id57" draw:style-name="a224" draw:name="Shape 5">
          <svg:title/>
          <svg:desc/>
          <text:p text:style-name="a223" text:class-names="" text:cond-style-name=""><text:span text:style-name="a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in" svg:y="1.4in" svg:width="2.5in" svg:height="0.5in" draw:id="id58" draw:style-name="a228" draw:name="Text 6">
          <svg:title/>
          <svg:desc/>
          <text:p text:style-name="a227" text:class-names="" text:cond-style-name=""><text:span text:style-name="a225" text:class-names="">~79.78 µg/m³</text:span><text:span text:style-name="a2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in" svg:y="1.9in" svg:width="2.5in" svg:height="0.3in" draw:id="id59" draw:style-name="a233" draw:name="Text 7">
          <svg:title/>
          <svg:desc/>
          <text:p text:style-name="a232" text:class-names="" text:cond-style-name=""><text:span text:style-name="a229" text:class-names="">Promedio</text:span><text:span text:style-name="a230" text:class-names=""><text:s text:c="1"/>general del dataset</text:span><text:span text:style-name="a2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2.67in" svg:width="2.75in" svg:height="1.1in" draw:id="id60" draw:style-name="a236" draw:name="Shape 8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2.67in" svg:width="0.12in" svg:height="1.1in" draw:id="id61" draw:style-name="a239" draw:name="Shape 9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in" svg:y="2.60225in" svg:width="2.5in" svg:height="0.5in" draw:id="id62" draw:style-name="a243" draw:name="Text 10">
          <svg:title/>
          <svg:desc/>
          <text:p text:style-name="a242" text:class-names="" text:cond-style-name=""><text:span text:style-name="a240" text:class-names="">75 µg/m³</text:span><text:span text:style-name="a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in" svg:y="2.94826in" svg:width="2.5in" svg:height="0.3in" draw:id="id63" draw:style-name="a253" draw:name="Text 11">
          <svg:title/>
          <svg:desc/>
          <text:p text:style-name="a252" text:class-names="" text:cond-style-name=""><text:span text:style-name="a244" text:class-names="">Umbral <text:s text:c="1"/></text:span><text:span text:style-name="a245" text:class-names="">diario</text:span><text:span text:style-name="a246" text:class-names=""> </text:span><text:span text:style-name="a247" text:class-names="">establecido</text:span><text:span text:style-name="a248" text:class-names=""><text:s text:c="1"/></text:span><text:span text:style-name="a249" text:class-names="">en</text:span><text:span text:style-name="a250" text:class-names=""><text:s text:c="1"/>China </text:span><text:span text:style-name="a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3.99in" svg:width="2.75in" svg:height="1.1in" draw:id="id64" draw:style-name="a256" draw:name="Shape 12">
          <svg:title/>
          <svg:desc/>
          <text:p text:style-name="a255" text:class-names="" text:cond-style-name=""><text:span text:style-name="a2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3.99in" svg:width="0.12in" svg:height="1.1in" draw:id="id65" draw:style-name="a259" draw:name="Shape 1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in" svg:y="4.27075in" svg:width="1.71875in" svg:height="0.17187in" draw:id="id66" draw:style-name="a265" draw:name="Text 14">
          <svg:title/>
          <svg:desc/>
          <text:p text:style-name="a261" text:class-names="" text:cond-style-name=""><text:span text:style-name="a260" text:class-names=""/></text:p>
          <text:p text:style-name="a264" text:class-names="" text:cond-style-name=""><text:span text:style-name="a262" text:class-names="">×3.19</text:span><text:span text:style-name="a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915in" svg:y="4.42451in" svg:width="1.96626in" svg:height="0.27011in" draw:id="id67" draw:style-name="a273" draw:name="Text 15">
          <svg:title/>
          <svg:desc/>
          <text:p text:style-name="a272" text:class-names="" text:cond-style-name=""><text:span text:style-name="a266" text:class-names="">Por<text:s text:c="1"/></text:span><text:span text:style-name="a267" text:class-names="">encima</text:span><text:span text:style-name="a268" text:class-names=""><text:s text:c="1"/>del<text:s text:c="1"/></text:span><text:span text:style-name="a269" text:class-names="">límite</text:span><text:span text:style-name="a270" text:class-names=""> OMS</text:span><text:span text:style-name="a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274" draw:name="Imagen 19" svg:x="0.5in" svg:y="1.64477in" svg:width="5.47243in" svg:height="2.92277in" style:rel-width="scale" style:rel-height="scale">
          <draw:image xlink:href="media/image2.png" xlink:type="simple" xlink:show="embed" xlink:actuate="onLoad"/>
          <svg:title/>
          <svg:desc>Gráfico, Gráfico de barras

El contenido generado por IA puede ser incorrecto.</svg:desc>
        </draw:frame>
        <draw:custom-shape svg:x="6.90408in" svg:y="3.50331in" svg:width="1.27083in" svg:height="0.26875in" draw:id="id69" draw:style-name="a280" draw:name="Text 15">
          <svg:title/>
          <svg:desc/>
          <text:p text:style-name="a279" text:class-names="" text:cond-style-name=""><text:span text:style-name="a275" text:class-names="">Umbral<text:s text:c="1"/></text:span><text:span text:style-name="a276" text:class-names="">diario</text:span><text:span text:style-name="a277" text:class-names=""> OMS</text:span><text:span text:style-name="a2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284" draw:name="CuadroTexto 20" svg:x="6.76042in" svg:y="4.10417in" svg:width="1.80729in" svg:height="0.50488in">
          <draw:text-box>
            <text:p text:style-name="a283" text:class-names="" text:cond-style-name=""><text:span text:style-name="a281" text:class-names="">​</text:span><text:span text:style-name="a282" text:class-names=""/></text:p>
          </draw:text-box>
          <svg:title/>
          <svg:desc/>
        </draw:frame>
        <draw:custom-shape svg:x="2.11979in" svg:y="5.30938in" svg:width="5.03125in" svg:height="0.13854in" draw:id="id71" draw:style-name="a288" draw:name="Text 16">
          <svg:title/>
          <svg:desc/>
          <text:p text:style-name="a287" text:class-names="" text:cond-style-name=""><text:span text:style-name="a285" text:class-names="">Ninguna estación cumple el estándar OMS</text:span><text:span text:style-name="a2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in" svg:y="3.13667in" svg:width="2.5in" svg:height="0.5in" draw:id="id72" draw:style-name="a292" draw:name="Text 10">
          <svg:title/>
          <svg:desc/>
          <text:p text:style-name="a291" text:class-names="" text:cond-style-name=""><text:span text:style-name="a289" text:class-names="">25 µg/m³</text:span><text:span text:style-name="a2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98">
          <draw:page-thumbnail draw:page-number="4" svg:x="0in" svg:y="0in" svg:width="0in" svg:height="0in" presentation:class="page" draw:id="id73" presentation:style-name="a293" draw:name="Slide Image Placeholder 1">
            <svg:title/>
            <svg:desc/>
          </draw:page-thumbnail>
          <draw:frame draw:id="id74" presentation:style-name="a29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75" presentation:style-name="a297" draw:name="Slide Number Placeholder 3" svg:x="0in" svg:y="0in" svg:width="0in" svg:height="0in" presentation:class="page-number" presentation:placeholder="false">
            <draw:text-box>
              <text:p text:style-name="a296" text:class-names="" text:cond-style-name=""><text:span text:style-name="a295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13" draw:style-name="a299" draw:master-page-name="Master1-Layout1-cust-DEFAULT" presentation:presentation-page-layout-name="Master1-PPL1" draw:id="Slide-268">
        <draw:custom-shape svg:x="9.3in" svg:y="5.2in" svg:width="0.5in" svg:height="0.25in" draw:id="id76" draw:style-name="a302" draw:name="Text 0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8in" svg:width="1.4in" svg:height="0.28in" draw:id="id77" draw:style-name="a305" draw:name="Shape 1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7in" svg:width="1.4in" svg:height="0.28in" draw:id="id78" draw:style-name="a309" draw:name="Text 2">
          <svg:title/>
          <svg:desc/>
          <text:p text:style-name="a308" text:class-names="" text:cond-style-name=""><text:span text:style-name="a306" text:class-names="">02 · DIAGNÓSTICO</text:span><text:span text:style-name="a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65in" svg:width="9in" svg:height="0.55in" draw:id="id79" draw:style-name="a319" draw:name="Text 3">
          <svg:title/>
          <svg:desc/>
          <text:p text:style-name="a318" text:class-names="" text:cond-style-name=""><text:span text:style-name="a310" text:class-names="">PM10<text:s text:c="1"/></text:span><text:span text:style-name="a311" text:class-names="">promedio</text:span><text:span text:style-name="a312" text:class-names=""><text:s text:c="1"/></text:span><text:span text:style-name="a313" text:class-names="">por</text:span><text:span text:style-name="a314" text:class-names=""><text:s text:c="1"/></text:span><text:span text:style-name="a315" text:class-names="">estación</text:span><text:span text:style-name="a316" text:class-names=""><text:s text:c="1"/>(2013–2017)</text:span><text:span text:style-name="a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1.35in" svg:width="2.75in" svg:height="1.1in" draw:id="id80" draw:style-name="a322" draw:name="Shape 4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1.35in" svg:width="0.12in" svg:height="1.1in" draw:id="id81" draw:style-name="a325" draw:name="Shape 5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in" svg:y="1.4in" svg:width="2.5in" svg:height="0.5in" draw:id="id82" draw:style-name="a329" draw:name="Text 6">
          <svg:title/>
          <svg:desc/>
          <text:p text:style-name="a328" text:class-names="" text:cond-style-name=""><text:span text:style-name="a326" text:class-names="">~ 104.91 µg/m³</text:span><text:span text:style-name="a3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in" svg:y="1.9in" svg:width="2.5in" svg:height="0.3in" draw:id="id83" draw:style-name="a334" draw:name="Text 7">
          <svg:title/>
          <svg:desc/>
          <text:p text:style-name="a333" text:class-names="" text:cond-style-name=""><text:span text:style-name="a330" text:class-names="">Promedio</text:span><text:span text:style-name="a331" text:class-names=""><text:s text:c="1"/>general del dataset</text:span><text:span text:style-name="a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2.67in" svg:width="2.75in" svg:height="1.1in" draw:id="id84" draw:style-name="a337" draw:name="Shape 8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2.67in" svg:width="0.12in" svg:height="1.1in" draw:id="id85" draw:style-name="a340" draw:name="Shape 9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in" svg:y="2.56601in" svg:width="2.5in" svg:height="0.5in" draw:id="id86" draw:style-name="a345" draw:name="Text 10">
          <svg:title/>
          <svg:desc/>
          <text:p text:style-name="a344" text:class-names="" text:cond-style-name=""><text:span text:style-name="a341" text:class-names="">150</text:span><text:span text:style-name="a342" text:class-names=""><text:s text:c="1"/>µg/m³</text:span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in" svg:y="3.02661in" svg:width="2.5in" svg:height="0.3in" draw:id="id87" draw:style-name="a357" draw:name="Text 11">
          <svg:title/>
          <svg:desc/>
          <text:p text:style-name="a354" text:class-names="" text:cond-style-name=""><text:span text:style-name="a346" text:class-names="">Umbral<text:s text:c="1"/></text:span><text:span text:style-name="a347" text:class-names="">diario</text:span><text:span text:style-name="a348" text:class-names=""> </text:span><text:span text:style-name="a349" text:class-names="">establecido</text:span><text:span text:style-name="a350" text:class-names=""> </text:span><text:span text:style-name="a351" text:class-names="">en</text:span><text:span text:style-name="a352" text:class-names=""> China </text:span><text:span text:style-name="a353" text:class-names=""/></text:p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3.99in" svg:width="2.75in" svg:height="1.1in" draw:id="id88" draw:style-name="a360" draw:name="Shape 12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in" svg:y="3.99in" svg:width="0.12in" svg:height="1.1in" draw:id="id89" draw:style-name="a363" draw:name="Shape 13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706in" svg:y="4.29521in" svg:width="2.5in" svg:height="0.5in" draw:id="id90" draw:style-name="a367" draw:name="Text 14">
          <svg:title/>
          <svg:desc/>
          <text:p text:style-name="a366" text:class-names="" text:cond-style-name=""><text:span text:style-name="a364" text:class-names="">×1.5</text:span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1476in" svg:y="4.30449in" svg:width="1.78374in" svg:height="0.47935in" draw:id="id91" draw:style-name="a376" draw:name="Text 15">
          <svg:title/>
          <svg:desc/>
          <text:p text:style-name="a375" text:class-names="" text:cond-style-name=""><text:span text:style-name="a368" text:class-names="">por</text:span><text:span text:style-name="a369" text:class-names=""><text:s text:c="1"/></text:span><text:span text:style-name="a370" text:class-names="">encima</text:span><text:span text:style-name="a371" text:class-names=""><text:s text:c="1"/>del<text:s text:c="1"/></text:span><text:span text:style-name="a372" text:class-names="">límite</text:span><text:span text:style-name="a373" text:class-names=""><text:s text:c="1"/>OMS<text:s text:c="1"/></text:span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5.2in" svg:width="9in" svg:height="0.3in" draw:id="id92" draw:style-name="a380" draw:name="Text 16">
          <svg:title/>
          <svg:desc/>
          <text:p text:style-name="a379" text:class-names="" text:cond-style-name=""><text:span text:style-name="a377" text:class-names="">Ninguna estación cumple el estándar OMS</text:span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381" draw:name="Imagen 20" svg:x="0.35888in" svg:y="1.65154in" svg:width="5.63542in" svg:height="3.03646in" style:rel-width="scale" style:rel-height="scale">
          <draw:image xlink:href="media/image3.jpeg" xlink:type="simple" xlink:show="embed" xlink:actuate="onLoad"/>
          <svg:title/>
          <svg:desc>Gráfico, Gráfico de barras

El contenido generado por IA puede ser incorrecto.</svg:desc>
        </draw:frame>
        <draw:custom-shape svg:x="8.85652in" svg:y="3.55764in" svg:width="2.5in" svg:height="0.5in" draw:id="id94" draw:style-name="a384" draw:name="Text 10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66in" svg:y="3.5314in" svg:width="1.27083in" svg:height="0.26875in" draw:id="id95" draw:style-name="a390" draw:name="Text 15">
          <svg:title/>
          <svg:desc/>
          <text:p text:style-name="a389" text:class-names="" text:cond-style-name=""><text:span text:style-name="a385" text:class-names="">Umbral<text:s text:c="1"/></text:span><text:span text:style-name="a386" text:class-names="">diario</text:span><text:span text:style-name="a387" text:class-names=""> OMS</text:span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in" svg:y="3.1729in" svg:width="2.5in" svg:height="0.5in" draw:id="id96" draw:style-name="a394" draw:name="Text 10">
          <svg:title/>
          <svg:desc/>
          <text:p text:style-name="a393" text:class-names="" text:cond-style-name=""><text:span text:style-name="a391" text:class-names="">70 µg/m³</text:span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00">
          <draw:page-thumbnail draw:page-number="5" svg:x="0in" svg:y="0in" svg:width="0in" svg:height="0in" presentation:class="page" draw:id="id97" presentation:style-name="a395" draw:name="Slide Image Placeholder 1">
            <svg:title/>
            <svg:desc/>
          </draw:page-thumbnail>
          <draw:frame draw:id="id98" presentation:style-name="a396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99" presentation:style-name="a399" draw:name="Slide Number Placeholder 3" svg:x="0in" svg:y="0in" svg:width="0in" svg:height="0in" presentation:class="page-number" presentation:placeholder="false">
            <draw:text-box>
              <text:p text:style-name="a398" text:class-names="" text:cond-style-name=""><text:span text:style-name="a397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draw:page draw:name="Slide15" draw:style-name="a401" draw:master-page-name="Master1-Layout1-cust-DEFAULT" presentation:presentation-page-layout-name="Master1-PPL1" draw:id="Slide-270">
        <draw:custom-shape svg:x="0.5in" svg:y="0.28in" svg:width="1.4in" svg:height="0.28in" draw:id="id100" draw:style-name="a404" draw:name="Shape 1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7in" svg:width="1.4in" svg:height="0.28in" draw:id="id101" draw:style-name="a408" draw:name="Text 2">
          <svg:title/>
          <svg:desc/>
          <text:p text:style-name="a407" text:class-names="" text:cond-style-name=""><text:span text:style-name="a405" text:class-names="">02 · DIAGNÓSTICO</text:span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65in" svg:width="9in" svg:height="0.55in" draw:id="id102" draw:style-name="a416" draw:name="Text 3">
          <svg:title/>
          <svg:desc/>
          <text:p text:style-name="a415" text:class-names="" text:cond-style-name=""><text:span text:style-name="a409" text:class-names="">Evolución</text:span><text:span text:style-name="a410" text:class-names=""><text:s text:c="1"/>temporal del PM2.5<text:s text:c="1"/></text:span><text:span text:style-name="a411" text:class-names="">por</text:span><text:span text:style-name="a412" text:class-names=""><text:s text:c="1"/></text:span><text:span text:style-name="a413" text:class-names="">estación</text:span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3125in" svg:y="1.99062in" svg:width="2.75in" svg:height="1.1in" draw:id="id103" draw:style-name="a419" draw:name="Shape 4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3125in" svg:y="1.99062in" svg:width="0.12in" svg:height="1.1in" draw:id="id104" draw:style-name="a422" draw:name="Shape 5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125in" svg:y="2.04062in" svg:width="2.5in" svg:height="0.5in" draw:id="id105" draw:style-name="a426" draw:name="Text 6">
          <svg:title/>
          <svg:desc/>
          <text:p text:style-name="a425" text:class-names="" text:cond-style-name=""><text:span text:style-name="a423" text:class-names="">2017<text:s text:c="1"/></text:span><text:span text:style-name="a424" text:class-names="">critic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125in" svg:y="2.63958in" svg:width="2.5in" svg:height="0.3in" draw:id="id106" draw:style-name="a430" draw:name="Text 7">
          <svg:title/>
          <svg:desc/>
          <text:p text:style-name="a429" text:class-names="" text:cond-style-name=""><text:span text:style-name="a427" text:class-names="">Tras una tendencia de mejora constante el 2017 muestra un repunte drástico</text:span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3125in" svg:y="3.31062in" svg:width="2.75in" svg:height="1.1in" draw:id="id107" draw:style-name="a433" draw:name="Shape 8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3125in" svg:y="3.31062in" svg:width="0.12in" svg:height="1.1in" draw:id="id108" draw:style-name="a436" draw:name="Shape 9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125in" svg:y="3.36063in" svg:width="2.5in" svg:height="0.5in" draw:id="id109" draw:style-name="a443" draw:name="Text 10">
          <svg:title/>
          <svg:desc/>
          <text:p text:style-name="a442" text:class-names="" text:cond-style-name=""><text:span text:style-name="a437" text:class-names="">Dingling</text:span><text:span text:style-name="a438" text:class-names=""> y </text:span><text:span text:style-name="a439" text:class-names="">Huairou</text:span><text:span text:style-name="a440" text:class-names=""> </text:span><text:span text:style-name="a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125in" svg:y="3.97521in" svg:width="2.5in" svg:height="0.3in" draw:id="id110" draw:style-name="a446" draw:name="Text 11">
          <svg:title/>
          <svg:desc/>
          <text:p text:style-name="a445" text:class-names="" text:cond-style-name=""><text:span text:style-name="a444" text:class-names="">Zunas rurales que reflejan mejoría en la calidad del ai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447" draw:name="Imagen 5" svg:x="0.23958in" svg:y="1.66362in" svg:width="6.32292in" svg:height="2.83421in" style:rel-width="scale" style:rel-height="scale">
          <draw:image xlink:href="media/image4.png" xlink:type="simple" xlink:show="embed" xlink:actuate="onLoad"/>
          <svg:title/>
          <svg:desc>Gráfico

El contenido generado por IA puede ser incorrecto.</svg:desc>
        </draw:frame>
        <presentation:notes draw:style-name="a453">
          <draw:page-thumbnail draw:page-number="6" svg:x="0in" svg:y="0in" svg:width="0in" svg:height="0in" presentation:class="page" draw:id="id112" presentation:style-name="a448" draw:name="Slide Image Placeholder 1">
            <svg:title/>
            <svg:desc/>
          </draw:page-thumbnail>
          <draw:frame draw:id="id113" presentation:style-name="a449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14" presentation:style-name="a452" draw:name="Slide Number Placeholder 3" svg:x="0in" svg:y="0in" svg:width="0in" svg:height="0in" presentation:class="page-number" presentation:placeholder="false">
            <draw:text-box>
              <text:p text:style-name="a451" text:class-names="" text:cond-style-name=""><text:span text:style-name="a450" text:class-names=""><text:page-number style:num-format="1" text:fixed="false">6</text:page-number></text:span></text:p>
            </draw:text-box>
            <svg:title/>
            <svg:desc/>
          </draw:frame>
        </presentation:notes>
      </draw:page>
      <draw:page draw:name="Slide 5" draw:style-name="a454" draw:master-page-name="Master1-Layout1-cust-DEFAULT" presentation:presentation-page-layout-name="Master1-PPL1" draw:id="Slide-260">
        <draw:custom-shape svg:x="9.3in" svg:y="5.2in" svg:width="0.5in" svg:height="0.25in" draw:id="id115" draw:style-name="a458" draw:name="Text 0">
          <svg:title/>
          <svg:desc/>
          <text:p text:style-name="a457" text:class-names="" text:cond-style-name=""><text:span text:style-name="a455" text:class-names="">5 / 12</text:span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8in" svg:width="1.4in" svg:height="0.28in" draw:id="id116" draw:style-name="a461" draw:name="Shape 1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7in" svg:width="1.4in" svg:height="0.28in" draw:id="id117" draw:style-name="a465" draw:name="Text 2">
          <svg:title/>
          <svg:desc/>
          <text:p text:style-name="a464" text:class-names="" text:cond-style-name=""><text:span text:style-name="a462" text:class-names="">03 · PATRONES</text:span><text:span text:style-name="a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65in" svg:width="9in" svg:height="0.55in" draw:id="id118" draw:style-name="a469" draw:name="Text 3">
          <svg:title/>
          <svg:desc/>
          <text:p text:style-name="a468" text:class-names="" text:cond-style-name=""><text:span text:style-name="a466" text:class-names="">La contaminación tiene un patrón estacional claro</text:span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104in" svg:y="1.51667in" svg:width="3.23437in" svg:height="1.63125in" draw:id="id119" draw:style-name="a472" draw:name="Shape 4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104in" svg:y="1.51667in" svg:width="0.12in" svg:height="1.63125in" draw:id="id120" draw:style-name="a475" draw:name="Shape 5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104in" svg:y="1.51458in" svg:width="2.25in" svg:height="0.38in" draw:id="id121" draw:style-name="a479" draw:name="Text 6">
          <svg:title/>
          <svg:desc/>
          <text:p text:style-name="a478" text:class-names="" text:cond-style-name=""><text:span text:style-name="a476" text:class-names="">Invierno crítico</text:span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4062in" svg:y="1.87812in" svg:width="3.0625in" svg:height="1.17917in" draw:id="id122" draw:style-name="a486" draw:name="Text 7">
          <svg:title/>
          <svg:desc/>
          <text:p text:style-name="a482" text:class-names="" text:cond-style-name=""><text:span text:style-name="a480" text:class-names="">Dic–Feb: &gt;120 µg/m³</text:span><text:span text:style-name="a481" text:class-names=""/></text:p>
          <text:p text:style-name="a485" text:class-names="" text:cond-style-name=""><text:span text:style-name="a483" text:class-names="">Combinación de la actividad de calefacción nocturna y el fenómeno de inversión térmica, que atrapa los contaminantes cerca del suelo cuando el sol se oculta.</text:span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4062in" svg:y="3.34271in" svg:width="3.25in" svg:height="1.82917in" draw:id="id123" draw:style-name="a489" draw:name="Shape 8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3021in" svg:y="3.31667in" svg:width="0.12in" svg:height="1.86562in" draw:id="id124" draw:style-name="a492" draw:name="Shape 9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3021in" svg:y="3.34062in" svg:width="2.25in" svg:height="0.38in" draw:id="id125" draw:style-name="a496" draw:name="Text 10">
          <svg:title/>
          <svg:desc/>
          <text:p text:style-name="a495" text:class-names="" text:cond-style-name=""><text:span text:style-name="a493" text:class-names="">Verano favorable</text:span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3021in" svg:y="3.80833in" svg:width="2.89062in" svg:height="1.2in" draw:id="id126" draw:style-name="a504" draw:name="Text 11">
          <svg:title/>
          <svg:desc/>
          <text:p text:style-name="a499" text:class-names="" text:cond-style-name=""><text:span text:style-name="a497" text:class-names="">Jun–Ago: ~55 µg/m³</text:span><text:span text:style-name="a498" text:class-names=""/></text:p>
          <text:p text:style-name="a503" text:class-names="" text:cond-style-name=""><text:span text:style-name="a500" text:class-names="">Reducción de<text:s text:c="1"/></text:span><text:span text:style-name="a501" text:class-names="">fuentes de calefacción. Además epoca monzones, a humedad y las lluvias ayudan a mantener el suelo húmedo, evitando que el polvo y la tierra se levanten y floten en el aire.</text:span><text:span text:style-name="a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5.27in" svg:width="9in" svg:height="0.3in" draw:id="id127" draw:style-name="a508" draw:name="Text 12">
          <svg:title/>
          <svg:desc/>
          <text:p text:style-name="a507" text:class-names="" text:cond-style-name=""><text:span text:style-name="a505" text:class-names="">La "tormenta perfecta" invernal combina combustión de carbón, vientos débiles y ausencia de lluvia</text:span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509" draw:name="Imagen 16" svg:x="0.63542in" svg:y="1.25521in" svg:width="5.20833in" svg:height="3.89063in" style:rel-width="scale" style:rel-height="scale">
          <draw:image xlink:href="media/image5.png" xlink:type="simple" xlink:show="embed" xlink:actuate="onLoad"/>
          <svg:title/>
          <svg:desc>Gráfico, Gráfico de rectángulos

El contenido generado por IA puede ser incorrecto.</svg:desc>
        </draw:frame>
        <presentation:notes draw:style-name="a515">
          <draw:page-thumbnail draw:page-number="7" svg:x="0in" svg:y="0in" svg:width="0in" svg:height="0in" presentation:class="page" draw:id="id129" presentation:style-name="a510" draw:name="Slide Image Placeholder 1">
            <svg:title/>
            <svg:desc/>
          </draw:page-thumbnail>
          <draw:frame draw:id="id130" presentation:style-name="a511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31" presentation:style-name="a514" draw:name="Slide Number Placeholder 3" svg:x="0in" svg:y="0in" svg:width="0in" svg:height="0in" presentation:class="page-number" presentation:placeholder="false">
            <draw:text-box>
              <text:p text:style-name="a513" text:class-names="" text:cond-style-name=""><text:span text:style-name="a512" text:class-names=""><text:page-number style:num-format="1" text:fixed="false">7</text:page-number></text:span></text:p>
            </draw:text-box>
            <svg:title/>
            <svg:desc/>
          </draw:frame>
        </presentation:notes>
      </draw:page>
      <draw:page draw:name="Slide 6" draw:style-name="a516" draw:master-page-name="Master1-Layout1-cust-DEFAULT" presentation:presentation-page-layout-name="Master1-PPL1" draw:id="Slide-261">
        <draw:custom-shape svg:x="9.3in" svg:y="5.2in" svg:width="0.5in" svg:height="0.25in" draw:id="id132" draw:style-name="a519" draw:name="Text 0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8in" svg:width="1.4in" svg:height="0.28in" draw:id="id133" draw:style-name="a522" draw:name="Shape 1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7in" svg:width="1.4in" svg:height="0.28in" draw:id="id134" draw:style-name="a526" draw:name="Text 2">
          <svg:title/>
          <svg:desc/>
          <text:p text:style-name="a525" text:class-names="" text:cond-style-name=""><text:span text:style-name="a523" text:class-names="">03 · PATRONES</text:span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65in" svg:width="9in" svg:height="0.55in" draw:id="id135" draw:style-name="a530" draw:name="Text 3">
          <svg:title/>
          <svg:desc/>
          <text:p text:style-name="a529" text:class-names="" text:cond-style-name=""><text:span text:style-name="a527" text:class-names="">Las correlaciones revelan las fuentes de emisión</text:span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042in" svg:y="1.50625in" svg:width="2in" svg:height="0.38in" draw:id="id136" draw:style-name="a534" draw:name="Text 4">
          <svg:title/>
          <svg:desc/>
          <text:p text:style-name="a533" text:class-names="" text:cond-style-name=""><text:span text:style-name="a531" text:class-names="">PM2.5 ↔ PM10</text:span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042in" svg:y="1.55625in" svg:width="3.8in" svg:height="0.28in" draw:id="id137" draw:style-name="a537" draw:name="Shape 5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042in" svg:y="1.55625in" svg:width="3.344in" svg:height="0.28in" draw:id="id138" draw:style-name="a540" draw:name="Shape 6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042in" svg:y="1.50625in" svg:width="0.7in" svg:height="0.38in" draw:id="id139" draw:style-name="a544" draw:name="Text 7">
          <svg:title/>
          <svg:desc/>
          <text:p text:style-name="a543" text:class-names="" text:cond-style-name=""><text:span text:style-name="a541" text:class-names="">+0.88</text:span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042in" svg:y="1.52625in" svg:width="2.2in" svg:height="0.38in" draw:id="id140" draw:style-name="a548" draw:name="Text 8">
          <svg:title/>
          <svg:desc/>
          <text:p text:style-name="a547" text:class-names="" text:cond-style-name=""><text:span text:style-name="a545" text:class-names="">Mismas fuentes (carbón, polvo, tráfico)</text:span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042in" svg:y="2.18625in" svg:width="2in" svg:height="0.38in" draw:id="id141" draw:style-name="a552" draw:name="Text 9">
          <svg:title/>
          <svg:desc/>
          <text:p text:style-name="a551" text:class-names="" text:cond-style-name=""><text:span text:style-name="a549" text:class-names="">PM2.5 ↔ CO</text:span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042in" svg:y="2.23625in" svg:width="3.8in" svg:height="0.28in" draw:id="id142" draw:style-name="a555" draw:name="Shape 10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042in" svg:y="2.23625in" svg:width="3.002in" svg:height="0.28in" draw:id="id143" draw:style-name="a558" draw:name="Shape 11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042in" svg:y="2.18625in" svg:width="0.7in" svg:height="0.38in" draw:id="id144" draw:style-name="a562" draw:name="Text 12">
          <svg:title/>
          <svg:desc/>
          <text:p text:style-name="a561" text:class-names="" text:cond-style-name=""><text:span text:style-name="a559" text:class-names="">+0.79</text:span><text:span text:style-name="a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042in" svg:y="2.19583in" svg:width="2.31458in" svg:height="0.38in" draw:id="id145" draw:style-name="a592" draw:name="Text 13">
          <svg:title/>
          <svg:desc/>
          <text:p text:style-name="a591" text:class-names="" text:cond-style-name=""><text:span text:style-name="a563" text:class-names="">Monoxido</text:span><text:span text:style-name="a564" text:class-names=""><text:s text:c="1"/>de<text:s text:c="1"/></text:span><text:span text:style-name="a565" text:class-names="">carbono</text:span><text:span text:style-name="a566" text:class-names=""> -<text:s text:c="1"/></text:span><text:span text:style-name="a567" text:class-names="">la<text:s text:c="1"/></text:span><text:span text:style-name="a568" text:class-names="">calefacción</text:span><text:span text:style-name="a569" text:class-names=""><text:s text:c="1"/></text:span><text:span text:style-name="a570" text:class-names="">doméstica</text:span><text:span text:style-name="a571" text:class-names=""><text:s text:c="1"/>y las calderas<text:s text:c="1"/></text:span><text:span text:style-name="a572" text:class-names="">industriales</text:span><text:span text:style-name="a573" text:class-names=""><text:s text:c="1"/>son<text:s text:c="1"/></text:span><text:span text:style-name="a574" text:class-names="">los</text:span><text:span text:style-name="a575" text:class-names=""><text:s text:c="1"/></text:span><text:span text:style-name="a576" text:class-names="">principales</text:span><text:span text:style-name="a577" text:class-names=""><text:s text:c="1"/></text:span><text:span text:style-name="a578" text:class-names="">motores</text:span><text:span text:style-name="a579" text:class-names=""><text:s text:c="1"/></text:span><text:span text:style-name="a580" text:class-names="">que</text:span><text:span text:style-name="a581" text:class-names=""><text:s text:c="1"/></text:span><text:span text:style-name="a582" text:class-names="">empujan</text:span><text:span text:style-name="a583" text:class-names=""><text:s text:c="1"/></text:span><text:span text:style-name="a584" text:class-names="">el</text:span><text:span text:style-name="a585" text:class-names=""><text:s text:c="1"/>PM2.5<text:s text:c="1"/></text:span><text:span text:style-name="a586" text:class-names="">hacia</text:span><text:span text:style-name="a587" text:class-names=""><text:s text:c="1"/></text:span><text:span text:style-name="a588" text:class-names="">arriba</text:span><text:span text:style-name="a589" text:class-names="">.</text:span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042in" svg:y="2.86625in" svg:width="2in" svg:height="0.38in" draw:id="id146" draw:style-name="a596" draw:name="Text 14">
          <svg:title/>
          <svg:desc/>
          <text:p text:style-name="a595" text:class-names="" text:cond-style-name=""><text:span text:style-name="a593" text:class-names="">PM2.5 ↔ NO₂</text:span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042in" svg:y="2.91625in" svg:width="3.8in" svg:height="0.28in" draw:id="id147" draw:style-name="a599" draw:name="Shape 15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042in" svg:y="2.91625in" svg:width="2.546in" svg:height="0.28in" draw:id="id148" draw:style-name="a602" draw:name="Shape 16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042in" svg:y="2.86625in" svg:width="0.7in" svg:height="0.38in" draw:id="id149" draw:style-name="a606" draw:name="Text 17">
          <svg:title/>
          <svg:desc/>
          <text:p text:style-name="a605" text:class-names="" text:cond-style-name=""><text:span text:style-name="a603" text:class-names="">+0.67</text:span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042in" svg:y="2.88625in" svg:width="2.2in" svg:height="0.38in" draw:id="id150" draw:style-name="a621" draw:name="Text 18">
          <svg:title/>
          <svg:desc/>
          <text:p text:style-name="a620" text:class-names="" text:cond-style-name=""><text:span text:style-name="a607" text:class-names="">Dioxido</text:span><text:span text:style-name="a608" text:class-names=""><text:s text:c="1"/>de<text:s text:c="1"/></text:span><text:span text:style-name="a609" text:class-names="">Nitrogeno</text:span><text:span text:style-name="a610" text:class-names=""> - </text:span><text:span text:style-name="a611" text:class-names="">Tráfico</text:span><text:span text:style-name="a612" text:class-names=""><text:s text:c="1"/>vehicular<text:s text:c="1"/></text:span><text:span text:style-name="a613" text:class-names="">influye</text:span><text:span text:style-name="a614" text:class-names=""><text:s text:c="1"/></text:span><text:span text:style-name="a615" text:class-names="">en</text:span><text:span text:style-name="a616" text:class-names=""><text:s text:c="1"/></text:span><text:span text:style-name="a617" text:class-names="">el</text:span><text:span text:style-name="a618" text:class-names=""><text:s text:c="1"/></text:span><text:span text:style-name="a619" text:class-names="">aumen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042in" svg:y="3.54625in" svg:width="2in" svg:height="0.38in" draw:id="id151" draw:style-name="a625" draw:name="Text 19">
          <svg:title/>
          <svg:desc/>
          <text:p text:style-name="a624" text:class-names="" text:cond-style-name=""><text:span text:style-name="a622" text:class-names="">PM2.5 ↔ SO₂</text:span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042in" svg:y="3.59625in" svg:width="3.8in" svg:height="0.28in" draw:id="id152" draw:style-name="a628" draw:name="Shape 20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042in" svg:y="3.59625in" svg:width="1.824in" svg:height="0.28in" draw:id="id153" draw:style-name="a631" draw:name="Shape 21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042in" svg:y="3.54625in" svg:width="0.7in" svg:height="0.38in" draw:id="id154" draw:style-name="a635" draw:name="Text 22">
          <svg:title/>
          <svg:desc/>
          <text:p text:style-name="a634" text:class-names="" text:cond-style-name=""><text:span text:style-name="a632" text:class-names="">+0.48</text:span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042in" svg:y="3.5975in" svg:width="2.2in" svg:height="0.38in" draw:id="id155" draw:style-name="a674" draw:name="Text 23">
          <svg:title/>
          <svg:desc/>
          <text:p text:style-name="a673" text:class-names="" text:cond-style-name=""><text:span text:style-name="a636" text:class-names="">Dioxido</text:span><text:span text:style-name="a637" text:class-names=""><text:s text:c="1"/>de<text:s text:c="1"/></text:span><text:span text:style-name="a638" text:class-names="">azufre</text:span><text:span text:style-name="a639" text:class-names=""><text:s text:c="1"/>- </text:span><text:span text:style-name="a640" text:class-names="">Plantas</text:span><text:span text:style-name="a641" text:class-names=""><text:s text:c="1"/>de<text:s text:c="1"/></text:span><text:span text:style-name="a642" text:class-names="">carbón</text:span><text:span text:style-name="a643" text:class-names=""><text:s text:c="1"/>y<text:s text:c="1"/></text:span><text:span text:style-name="a644" text:class-names="">cementeras</text:span><text:span text:style-name="a645" text:class-names=""> </text:span><text:span text:style-name="a646" text:class-names="">que</text:span><text:span text:style-name="a647" text:class-names=""><text:s text:c="1"/></text:span><text:span text:style-name="a648" text:class-names="">sea</text:span><text:span text:style-name="a649" text:class-names=""><text:s text:c="1"/></text:span><text:span text:style-name="a650" text:class-names="">menor</text:span><text:span text:style-name="a651" text:class-names=""> </text:span><text:span text:style-name="a652" text:class-names="">sugiere</text:span><text:span text:style-name="a653" text:class-names=""><text:s text:c="1"/></text:span><text:span text:style-name="a654" text:class-names="">que</text:span><text:span text:style-name="a655" text:class-names=""><text:s text:c="1"/>la<text:s text:c="1"/></text:span><text:span text:style-name="a656" text:class-names="">industria</text:span><text:span text:style-name="a657" text:class-names=""><text:s text:c="1"/></text:span><text:span text:style-name="a658" text:class-names="">pesada</text:span><text:span text:style-name="a659" text:class-names=""><text:s text:c="1"/></text:span><text:span text:style-name="a660" text:class-names="">está</text:span><text:span text:style-name="a661" text:class-names=""><text:s text:c="1"/></text:span><text:span text:style-name="a662" text:class-names="">más</text:span><text:span text:style-name="a663" text:class-names=""><text:s text:c="1"/></text:span><text:span text:style-name="a664" text:class-names="">alejada</text:span><text:span text:style-name="a665" text:class-names=""><text:s text:c="1"/>del<text:s text:c="1"/></text:span><text:span text:style-name="a666" text:class-names="">centro</text:span><text:span text:style-name="a667" text:class-names=""><text:s text:c="1"/>o<text:s text:c="1"/></text:span><text:span text:style-name="a668" text:class-names="">más</text:span><text:span text:style-name="a669" text:class-names=""><text:s text:c="1"/></text:span><text:span text:style-name="a670" text:class-names="">controlada</text:span><text:span text:style-name="a671" text:class-names="">,</text:span><text:span text:style-name="a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042in" svg:y="4.22625in" svg:width="2in" svg:height="0.38in" draw:id="id156" draw:style-name="a678" draw:name="Text 24">
          <svg:title/>
          <svg:desc/>
          <text:p text:style-name="a677" text:class-names="" text:cond-style-name=""><text:span text:style-name="a675" text:class-names="">PM2.5 ↔ WSPM</text:span><text:span text:style-name="a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042in" svg:y="4.27625in" svg:width="3.8in" svg:height="0.28in" draw:id="id157" draw:style-name="a681" draw:name="Shape 25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8442in" svg:y="4.27625in" svg:width="1.026in" svg:height="0.28in" draw:id="id158" draw:style-name="a684" draw:name="Shape 26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042in" svg:y="4.22625in" svg:width="0.7in" svg:height="0.38in" draw:id="id159" draw:style-name="a688" draw:name="Text 27">
          <svg:title/>
          <svg:desc/>
          <text:p text:style-name="a687" text:class-names="" text:cond-style-name=""><text:span text:style-name="a685" text:class-names="">-0.27</text:span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042in" svg:y="4.36604in" svg:width="2.2in" svg:height="0.38in" draw:id="id160" draw:style-name="a716" draw:name="Text 28">
          <svg:title/>
          <svg:desc/>
          <text:p text:style-name="a715" text:class-names="" text:cond-style-name=""><text:span text:style-name="a689" text:class-names="">Relación</text:span><text:span text:style-name="a690" text:class-names=""><text:s text:c="1"/></text:span><text:span text:style-name="a691" text:class-names="">inversa</text:span><text:span text:style-name="a692" text:class-names=""><text:s text:c="1"/></text:span><text:span text:style-name="a693" text:class-names="">confirma</text:span><text:span text:style-name="a694" text:class-names=""><text:s text:c="1"/></text:span><text:span text:style-name="a695" text:class-names="">que</text:span><text:span text:style-name="a696" text:class-names=""><text:s text:c="1"/></text:span><text:span text:style-name="a697" text:class-names="">el</text:span><text:span text:style-name="a698" text:class-names=""><text:s text:c="1"/></text:span><text:span text:style-name="a699" text:class-names="">viento</text:span><text:span text:style-name="a700" text:class-names=""><text:s text:c="1"/></text:span><text:span text:style-name="a701" text:class-names="">actúa</text:span><text:span text:style-name="a702" text:class-names=""><text:s text:c="1"/></text:span><text:span text:style-name="a703" text:class-names="">como</text:span><text:span text:style-name="a704" text:class-names=""><text:s text:c="1"/></text:span><text:span text:style-name="a705" text:class-names="">el</text:span><text:span text:style-name="a706" text:class-names=""><text:s text:c="1"/></text:span><text:span text:style-name="a707" text:class-names="">único</text:span><text:span text:style-name="a708" text:class-names=""><text:s text:c="1"/></text:span><text:span text:style-name="a709" text:class-names="">mecanismo</text:span><text:span text:style-name="a710" text:class-names=""><text:s text:c="1"/>natural de defensa,<text:s text:c="1"/></text:span><text:span text:style-name="a711" text:class-names="">dispersando</text:span><text:span text:style-name="a712" text:class-names=""><text:s text:c="1"/>las<text:s text:c="1"/></text:span><text:span text:style-name="a713" text:class-names="">partículas</text:span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96418in" svg:width="9in" svg:height="0.36in" draw:id="id161" draw:style-name="a719" draw:name="Shape 34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96418in" svg:width="8.8in" svg:height="0.36in" draw:id="id162" draw:style-name="a723" draw:name="Text 35">
          <svg:title/>
          <svg:desc/>
          <text:p text:style-name="a722" text:class-names="" text:cond-style-name=""><text:span text:style-name="a720" text:class-names="">Conclusión clave: PM2.5–CO–NO₂–SO₂ forman un cluster cohesionado → causa raíz común: combustión de combustibles fósiles</text:span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29">
          <draw:page-thumbnail draw:page-number="8" svg:x="0in" svg:y="0in" svg:width="0in" svg:height="0in" presentation:class="page" draw:id="id163" presentation:style-name="a724" draw:name="Slide Image Placeholder 1">
            <svg:title/>
            <svg:desc/>
          </draw:page-thumbnail>
          <draw:frame draw:id="id164" presentation:style-name="a725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65" presentation:style-name="a728" draw:name="Slide Number Placeholder 3" svg:x="0in" svg:y="0in" svg:width="0in" svg:height="0in" presentation:class="page-number" presentation:placeholder="false">
            <draw:text-box>
              <text:p text:style-name="a727" text:class-names="" text:cond-style-name=""><text:span text:style-name="a726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 8" draw:style-name="a730" draw:master-page-name="Master1-Layout1-cust-DEFAULT" presentation:presentation-page-layout-name="Master1-PPL1" draw:id="Slide-263">
        <draw:custom-shape svg:x="9.3in" svg:y="5.2in" svg:width="0.5in" svg:height="0.25in" draw:id="id166" draw:style-name="a733" draw:name="Text 0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8in" svg:width="1.4in" svg:height="0.28in" draw:id="id167" draw:style-name="a736" draw:name="Shape 1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7in" svg:width="1.4in" svg:height="0.28in" draw:id="id168" draw:style-name="a740" draw:name="Text 2">
          <svg:title/>
          <svg:desc/>
          <text:p text:style-name="a739" text:class-names="" text:cond-style-name=""><text:span text:style-name="a737" text:class-names="">04 · MEDIDAS</text:span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65in" svg:width="9in" svg:height="0.55in" draw:id="id169" draw:style-name="a744" draw:name="Text 3">
          <svg:title/>
          <svg:desc/>
          <text:p text:style-name="a743" text:class-names="" text:cond-style-name=""><text:span text:style-name="a741" text:class-names="">Medida 1 — Restricción de tráfico en hora punta</text:span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draw:style-name="a745" draw:name="Chart 0" svg:x="0.5in" svg:y="1.3in" svg:width="5.5in" svg:height="3.9in" style:rel-width="scale" style:rel-height="scale">
          <draw:object xlink:href="Object 1/" xlink:type="simple" xlink:show="embed" xlink:actuate="onLoad"/>
          <svg:title/>
          <svg:desc/>
        </draw:frame>
        <draw:custom-shape svg:x="6.3in" svg:y="1.3in" svg:width="3.15in" svg:height="1.28in" draw:id="id171" draw:style-name="a748" draw:name="Shape 4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1.3in" svg:width="0.12in" svg:height="1.28in" draw:id="id172" draw:style-name="a751" draw:name="Shape 5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1.36in" svg:width="2.85in" svg:height="0.32in" draw:id="id173" draw:style-name="a755" draw:name="Text 6">
          <svg:title/>
          <svg:desc/>
          <text:p text:style-name="a754" text:class-names="" text:cond-style-name=""><text:span text:style-name="a752" text:class-names="">9:00–11:00</text:span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1.68in" svg:width="2.85in" svg:height="0.3in" draw:id="id174" draw:style-name="a759" draw:name="Text 7">
          <svg:title/>
          <svg:desc/>
          <text:p text:style-name="a758" text:class-names="" text:cond-style-name=""><text:span text:style-name="a756" text:class-names="">−9.54 µg/m³ <text:s text:c="1"/>(−12.19%)</text:span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2in" svg:width="2.85in" svg:height="0.32in" draw:id="id175" draw:style-name="a763" draw:name="Text 8">
          <svg:title/>
          <svg:desc/>
          <text:p text:style-name="a762" text:class-names="" text:cond-style-name=""><text:span text:style-name="a760" text:class-names="">~6.880 muertes evitables/año*</text:span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2.72in" svg:width="3.15in" svg:height="1.28in" draw:id="id176" draw:style-name="a766" draw:name="Shape 9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2.72in" svg:width="0.12in" svg:height="1.28in" draw:id="id177" draw:style-name="a769" draw:name="Shape 10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2.78in" svg:width="2.85in" svg:height="0.32in" draw:id="id178" draw:style-name="a773" draw:name="Text 11">
          <svg:title/>
          <svg:desc/>
          <text:p text:style-name="a772" text:class-names="" text:cond-style-name=""><text:span text:style-name="a770" text:class-names="">7:00–9:00</text:span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3.1in" svg:width="2.85in" svg:height="0.3in" draw:id="id179" draw:style-name="a777" draw:name="Text 12">
          <svg:title/>
          <svg:desc/>
          <text:p text:style-name="a776" text:class-names="" text:cond-style-name=""><text:span text:style-name="a774" text:class-names="">−10.03 µg/m³ <text:s text:c="1"/>(−12.85%)</text:span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3.42in" svg:width="2.85in" svg:height="0.32in" draw:id="id180" draw:style-name="a781" draw:name="Text 13">
          <svg:title/>
          <svg:desc/>
          <text:p text:style-name="a780" text:class-names="" text:cond-style-name=""><text:span text:style-name="a778" text:class-names="">~7.660 muertes evitables/año*</text:span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4.14in" svg:width="3.15in" svg:height="1.28in" draw:id="id181" draw:style-name="a784" draw:name="Shape 14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4.14in" svg:width="0.12in" svg:height="1.28in" draw:id="id182" draw:style-name="a787" draw:name="Shape 15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4.2in" svg:width="2.85in" svg:height="0.32in" draw:id="id183" draw:style-name="a791" draw:name="Text 16">
          <svg:title/>
          <svg:desc/>
          <text:p text:style-name="a790" text:class-names="" text:cond-style-name=""><text:span text:style-name="a788" text:class-names="">18:00–20:00</text:span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4.52in" svg:width="2.85in" svg:height="0.3in" draw:id="id184" draw:style-name="a795" draw:name="Text 17">
          <svg:title/>
          <svg:desc/>
          <text:p text:style-name="a794" text:class-names="" text:cond-style-name=""><text:span text:style-name="a792" text:class-names="">−8.10 µg/m³ <text:s text:c="1"/>(−14.36%)</text:span><text:span text:style-name="a7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4.84in" svg:width="2.85in" svg:height="0.32in" draw:id="id185" draw:style-name="a799" draw:name="Text 18">
          <svg:title/>
          <svg:desc/>
          <text:p text:style-name="a798" text:class-names="" text:cond-style-name=""><text:span text:style-name="a796" text:class-names="">~8.106 muertes evitables/año*</text:span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5.2in" svg:width="9in" svg:height="0.28in" draw:id="id186" draw:style-name="a803" draw:name="Text 19">
          <svg:title/>
          <svg:desc/>
          <text:p text:style-name="a802" text:class-names="" text:cond-style-name=""><text:span text:style-name="a800" text:class-names="">* Aproximación ilustrativa. No sumar entre medidas. Ver nota metodológica.</text:span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09">
          <draw:page-thumbnail draw:page-number="9" svg:x="0in" svg:y="0in" svg:width="0in" svg:height="0in" presentation:class="page" draw:id="id187" presentation:style-name="a804" draw:name="Slide Image Placeholder 1">
            <svg:title/>
            <svg:desc/>
          </draw:page-thumbnail>
          <draw:frame draw:id="id188" presentation:style-name="a805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89" presentation:style-name="a808" draw:name="Slide Number Placeholder 3" svg:x="0in" svg:y="0in" svg:width="0in" svg:height="0in" presentation:class="page-number" presentation:placeholder="false">
            <draw:text-box>
              <text:p text:style-name="a807" text:class-names="" text:cond-style-name=""><text:span text:style-name="a806" text:class-names=""><text:page-number style:num-format="1" text:fixed="false">9</text:page-number></text:span></text:p>
            </draw:text-box>
            <svg:title/>
            <svg:desc/>
          </draw:frame>
        </presentation:notes>
      </draw:page>
      <draw:page draw:name="Slide 9" draw:style-name="a810" draw:master-page-name="Master1-Layout1-cust-DEFAULT" presentation:presentation-page-layout-name="Master1-PPL1" draw:id="Slide-264">
        <draw:custom-shape svg:x="9.3in" svg:y="5.2in" svg:width="0.5in" svg:height="0.25in" draw:id="id190" draw:style-name="a813" draw:name="Text 0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8in" svg:width="1.4in" svg:height="0.28in" draw:id="id191" draw:style-name="a816" draw:name="Shape 1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7in" svg:width="1.4in" svg:height="0.28in" draw:id="id192" draw:style-name="a820" draw:name="Text 2">
          <svg:title/>
          <svg:desc/>
          <text:p text:style-name="a819" text:class-names="" text:cond-style-name=""><text:span text:style-name="a817" text:class-names="">04 · MEDIDAS</text:span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65in" svg:width="9in" svg:height="0.55in" draw:id="id193" draw:style-name="a824" draw:name="Text 3">
          <svg:title/>
          <svg:desc/>
          <text:p text:style-name="a823" text:class-names="" text:cond-style-name=""><text:span text:style-name="a821" text:class-names="">Medida 2 — Restricción progresiva en hora punta</text:span><text:span text:style-name="a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draw:style-name="a825" draw:name="Chart 0" svg:x="0.5in" svg:y="1.3in" svg:width="5.8in" svg:height="3.8in" style:rel-width="scale" style:rel-height="scale">
          <draw:object xlink:href="Object 2/" xlink:type="simple" xlink:show="embed" xlink:actuate="onLoad"/>
          <svg:title/>
          <svg:desc/>
        </draw:frame>
        <draw:custom-shape svg:x="6.3in" svg:y="1.3in" svg:width="1in" svg:height="0.35in" draw:id="id195" draw:style-name="a829" draw:name="Text 4">
          <svg:title/>
          <svg:desc/>
          <text:p text:style-name="a828" text:class-names="" text:cond-style-name=""><text:span text:style-name="a826" text:class-names="">Reducción</text:span><text:span text:style-name="a8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in" svg:y="1.3in" svg:width="1.2in" svg:height="0.35in" draw:id="id196" draw:style-name="a833" draw:name="Text 5">
          <svg:title/>
          <svg:desc/>
          <text:p text:style-name="a832" text:class-names="" text:cond-style-name=""><text:span text:style-name="a830" text:class-names="">Δ PM2.5</text:span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5in" svg:y="1.3in" svg:width="0.8in" svg:height="0.35in" draw:id="id197" draw:style-name="a837" draw:name="Text 6">
          <svg:title/>
          <svg:desc/>
          <text:p text:style-name="a836" text:class-names="" text:cond-style-name=""><text:span text:style-name="a834" text:class-names="">%</text:span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1.75in" svg:width="3.15in" svg:height="0.9in" draw:id="id198" draw:style-name="a840" draw:name="Shape 7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1.75in" svg:width="0.12in" svg:height="0.9in" draw:id="id199" draw:style-name="a843" draw:name="Shape 8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1.8in" svg:width="0.85in" svg:height="0.45in" draw:id="id200" draw:style-name="a847" draw:name="Text 9">
          <svg:title/>
          <svg:desc/>
          <text:p text:style-name="a846" text:class-names="" text:cond-style-name=""><text:span text:style-name="a844" text:class-names="">−10%</text:span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5in" svg:y="1.83in" svg:width="1.15in" svg:height="0.38in" draw:id="id201" draw:style-name="a851" draw:name="Text 10">
          <svg:title/>
          <svg:desc/>
          <text:p text:style-name="a850" text:class-names="" text:cond-style-name=""><text:span text:style-name="a848" text:class-names="">−9.91 µg/m³</text:span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2in" svg:y="1.83in" svg:width="0.85in" svg:height="0.38in" draw:id="id202" draw:style-name="a855" draw:name="Text 11">
          <svg:title/>
          <svg:desc/>
          <text:p text:style-name="a854" text:class-names="" text:cond-style-name=""><text:span text:style-name="a852" text:class-names="">−13.05%</text:span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2.27in" svg:width="2.9in" svg:height="0.28in" draw:id="id203" draw:style-name="a859" draw:name="Text 12">
          <svg:title/>
          <svg:desc/>
          <text:p text:style-name="a858" text:class-names="" text:cond-style-name=""><text:span text:style-name="a856" text:class-names="">≈ ~7.366 muertes evitables/año*</text:span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2.85in" svg:width="3.15in" svg:height="0.9in" draw:id="id204" draw:style-name="a862" draw:name="Shape 13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2.85in" svg:width="0.12in" svg:height="0.9in" draw:id="id205" draw:style-name="a865" draw:name="Shape 14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2.9in" svg:width="0.85in" svg:height="0.45in" draw:id="id206" draw:style-name="a869" draw:name="Text 15">
          <svg:title/>
          <svg:desc/>
          <text:p text:style-name="a868" text:class-names="" text:cond-style-name=""><text:span text:style-name="a866" text:class-names="">−20%</text:span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5in" svg:y="2.93in" svg:width="1.15in" svg:height="0.38in" draw:id="id207" draw:style-name="a873" draw:name="Text 16">
          <svg:title/>
          <svg:desc/>
          <text:p text:style-name="a872" text:class-names="" text:cond-style-name=""><text:span text:style-name="a870" text:class-names="">−19.81 µg/m³</text:span><text:span text:style-name="a8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2in" svg:y="2.93in" svg:width="0.85in" svg:height="0.38in" draw:id="id208" draw:style-name="a877" draw:name="Text 17">
          <svg:title/>
          <svg:desc/>
          <text:p text:style-name="a876" text:class-names="" text:cond-style-name=""><text:span text:style-name="a874" text:class-names="">−26.11%</text:span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3.37in" svg:width="2.9in" svg:height="0.28in" draw:id="id209" draw:style-name="a881" draw:name="Text 18">
          <svg:title/>
          <svg:desc/>
          <text:p text:style-name="a880" text:class-names="" text:cond-style-name=""><text:span text:style-name="a878" text:class-names="">≈ ~14.737 muertes evitables/año*</text:span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3.95in" svg:width="3.15in" svg:height="0.9in" draw:id="id210" draw:style-name="a884" draw:name="Shape 1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in" svg:y="3.95in" svg:width="0.12in" svg:height="0.9in" draw:id="id211" draw:style-name="a887" draw:name="Shape 20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4in" svg:width="0.85in" svg:height="0.45in" draw:id="id212" draw:style-name="a891" draw:name="Text 21">
          <svg:title/>
          <svg:desc/>
          <text:p text:style-name="a890" text:class-names="" text:cond-style-name=""><text:span text:style-name="a888" text:class-names="">−30%</text:span><text:span text:style-name="a8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5in" svg:y="4.03in" svg:width="1.15in" svg:height="0.38in" draw:id="id213" draw:style-name="a895" draw:name="Text 22">
          <svg:title/>
          <svg:desc/>
          <text:p text:style-name="a894" text:class-names="" text:cond-style-name=""><text:span text:style-name="a892" text:class-names="">−29.72 µg/m³</text:span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2in" svg:y="4.03in" svg:width="0.85in" svg:height="0.38in" draw:id="id214" draw:style-name="a899" draw:name="Text 23">
          <svg:title/>
          <svg:desc/>
          <text:p text:style-name="a898" text:class-names="" text:cond-style-name=""><text:span text:style-name="a896" text:class-names="">−39.16%</text:span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4.47in" svg:width="2.9in" svg:height="0.28in" draw:id="id215" draw:style-name="a903" draw:name="Text 24">
          <svg:title/>
          <svg:desc/>
          <text:p text:style-name="a902" text:class-names="" text:cond-style-name=""><text:span text:style-name="a900" text:class-names="">≈ ~22.103 muertes evitables/año*</text:span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5.15in" svg:width="9in" svg:height="0.3in" draw:id="id216" draw:style-name="a907" draw:name="Text 25">
          <svg:title/>
          <svg:desc/>
          <text:p text:style-name="a906" text:class-names="" text:cond-style-name=""><text:span text:style-name="a904" text:class-names="">Efecto aproximadamente proporcional: cada 10% de reducción → −13% de PM2.5</text:span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13">
          <draw:page-thumbnail draw:page-number="10" svg:x="0in" svg:y="0in" svg:width="0in" svg:height="0in" presentation:class="page" draw:id="id217" presentation:style-name="a908" draw:name="Slide Image Placeholder 1">
            <svg:title/>
            <svg:desc/>
          </draw:page-thumbnail>
          <draw:frame draw:id="id218" presentation:style-name="a909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219" presentation:style-name="a912" draw:name="Slide Number Placeholder 3" svg:x="0in" svg:y="0in" svg:width="0in" svg:height="0in" presentation:class="page-number" presentation:placeholder="false">
            <draw:text-box>
              <text:p text:style-name="a911" text:class-names="" text:cond-style-name=""><text:span text:style-name="a910" text:class-names=""><text:page-number style:num-format="1" text:fixed="false">10</text:page-number></text:span></text:p>
            </draw:text-box>
            <svg:title/>
            <svg:desc/>
          </draw:frame>
        </presentation:notes>
      </draw:page>
      <draw:page draw:name="Slide 10" draw:style-name="a914" draw:master-page-name="Master1-Layout1-cust-DEFAULT" presentation:presentation-page-layout-name="Master1-PPL1" draw:id="Slide-265">
        <draw:custom-shape svg:x="9.3in" svg:y="5.2in" svg:width="0.5in" svg:height="0.25in" draw:id="id220" draw:style-name="a917" draw:name="Text 0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8in" svg:width="1.4in" svg:height="0.28in" draw:id="id221" draw:style-name="a920" draw:name="Shape 1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7in" svg:width="1.4in" svg:height="0.28in" draw:id="id222" draw:style-name="a924" draw:name="Text 2">
          <svg:title/>
          <svg:desc/>
          <text:p text:style-name="a923" text:class-names="" text:cond-style-name=""><text:span text:style-name="a921" text:class-names="">04 · MEDIDAS</text:span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65in" svg:width="9in" svg:height="0.55in" draw:id="id223" draw:style-name="a928" draw:name="Text 3">
          <svg:title/>
          <svg:desc/>
          <text:p text:style-name="a927" text:class-names="" text:cond-style-name=""><text:span text:style-name="a925" text:class-names="">Medida 3 — Protocolo de baja dispersión atmosférica</text:span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35in" svg:width="4.3in" svg:height="2in" draw:id="id224" draw:style-name="a931" draw:name="Shape 4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1.45in" svg:width="4in" svg:height="0.4in" draw:id="id225" draw:style-name="a935" draw:name="Text 5">
          <svg:title/>
          <svg:desc/>
          <text:p text:style-name="a934" text:class-names="" text:cond-style-name=""><text:span text:style-name="a932" text:class-names="">Condición de activación</text:span><text:span text:style-name="a9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1.9in" svg:width="4in" svg:height="1in" draw:id="id226" draw:style-name="a945" draw:name="Text 6">
          <svg:title/>
          <svg:desc/>
          <text:p text:style-name="a938" text:class-names="" text:cond-style-name=""><text:span text:style-name="a936" text:class-names="">WSPM ≤ 0.9 m/s <text:s text:c="1"/>(percentil 25)</text:span><text:span text:style-name="a937" text:class-names=""/></text:p>
          <text:p text:style-name="a941" text:class-names="" text:cond-style-name=""><text:span text:style-name="a939" text:class-names="">+</text:span><text:span text:style-name="a940" text:class-names=""/></text:p>
          <text:p text:style-name="a944" text:class-names="" text:cond-style-name=""><text:span text:style-name="a942" text:class-names="">RAIN = 0 <text:s text:c="1"/>(sin precipitación)</text:span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2.95in" svg:width="4in" svg:height="0.28in" draw:id="id227" draw:style-name="a949" draw:name="Text 7">
          <svg:title/>
          <svg:desc/>
          <text:p text:style-name="a948" text:class-names="" text:cond-style-name=""><text:span text:style-name="a946" text:class-names="">8.677 episodios identificados</text:span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5in" svg:width="4.3in" svg:height="1.85in" draw:id="id228" draw:style-name="a952" draw:name="Shape 8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5in" svg:width="0.12in" svg:height="1.85in" draw:id="id229" draw:style-name="a955" draw:name="Shape 9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3.56in" svg:width="3.9in" svg:height="0.35in" draw:id="id230" draw:style-name="a959" draw:name="Text 10">
          <svg:title/>
          <svg:desc/>
          <text:p text:style-name="a958" text:class-names="" text:cond-style-name=""><text:span text:style-name="a956" text:class-names="">Resultado de la simulación</text:span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3.95in" svg:width="3.9in" svg:height="1.25in" draw:id="id231" draw:style-name="a972" draw:name="Text 11">
          <svg:title/>
          <svg:desc/>
          <text:p text:style-name="a962" text:class-names="" text:cond-style-name=""><text:span text:style-name="a960" text:class-names="">Reducción media: −12.97 µg/m³</text:span><text:span text:style-name="a961" text:class-names=""/></text:p>
          <text:p text:style-name="a965" text:class-names="" text:cond-style-name=""><text:span text:style-name="a963" text:class-names="">Reducción mediana: −10.79 µg/m³</text:span><text:span text:style-name="a964" text:class-names=""/></text:p>
          <text:p text:style-name="a968" text:class-names="" text:cond-style-name=""><text:span text:style-name="a966" text:class-names="">Reducción %: −12.69%</text:span><text:span text:style-name="a967" text:class-names=""/></text:p>
          <text:p text:style-name="a971" text:class-names="" text:cond-style-name=""><text:span text:style-name="a969" text:class-names="">~7.162 muertes evitables/año*</text:span><text:span text:style-name="a9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35in" svg:width="4.3in" svg:height="0.38in" draw:id="id232" draw:style-name="a976" draw:name="Text 12">
          <svg:title/>
          <svg:desc/>
          <text:p text:style-name="a975" text:class-names="" text:cond-style-name=""><text:span text:style-name="a973" text:class-names="">Componentes del protocolo</text:span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85in" svg:width="0.45in" svg:height="0.45in" draw:id="id233" draw:style-name="a979" draw:name="Shape 13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85in" svg:width="0.45in" svg:height="0.45in" draw:id="id234" draw:style-name="a983" draw:name="Text 14">
          <svg:title/>
          <svg:desc/>
          <text:p text:style-name="a982" text:class-names="" text:cond-style-name=""><text:span text:style-name="a980" text:class-names="">1</text:span><text:span text:style-name="a9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in" svg:y="1.87in" svg:width="3.75in" svg:height="0.42in" draw:id="id235" draw:style-name="a987" draw:name="Text 15">
          <svg:title/>
          <svg:desc/>
          <text:p text:style-name="a986" text:class-names="" text:cond-style-name=""><text:span text:style-name="a984" text:class-names="">Restricción temporal del tráfico más contaminante en corredores clave</text:span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75in" svg:width="0.45in" svg:height="0.45in" draw:id="id236" draw:style-name="a990" draw:name="Shape 16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75in" svg:width="0.45in" svg:height="0.45in" draw:id="id237" draw:style-name="a994" draw:name="Text 17">
          <svg:title/>
          <svg:desc/>
          <text:p text:style-name="a993" text:class-names="" text:cond-style-name=""><text:span text:style-name="a991" text:class-names="">2</text:span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in" svg:y="2.77in" svg:width="3.75in" svg:height="0.42in" draw:id="id238" draw:style-name="a998" draw:name="Text 18">
          <svg:title/>
          <svg:desc/>
          <text:p text:style-name="a997" text:class-names="" text:cond-style-name=""><text:span text:style-name="a995" text:class-names="">Refuerzo extraordinario del transporte público (metro + autobús)</text:span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65in" svg:width="0.45in" svg:height="0.45in" draw:id="id239" draw:style-name="a1001" draw:name="Shape 19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65in" svg:width="0.45in" svg:height="0.45in" draw:id="id240" draw:style-name="a1005" draw:name="Text 20">
          <svg:title/>
          <svg:desc/>
          <text:p text:style-name="a1004" text:class-names="" text:cond-style-name=""><text:span text:style-name="a1002" text:class-names="">3</text:span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in" svg:y="3.67in" svg:width="3.75in" svg:height="0.42in" draw:id="id241" draw:style-name="a1009" draw:name="Text 21">
          <svg:title/>
          <svg:desc/>
          <text:p text:style-name="a1008" text:class-names="" text:cond-style-name=""><text:span text:style-name="a1006" text:class-names="">Recomendación de teletrabajo parcial en días de alerta</text:span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4.55in" svg:width="0.45in" svg:height="0.45in" draw:id="id242" draw:style-name="a1012" draw:name="Shape 22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4.55in" svg:width="0.45in" svg:height="0.45in" draw:id="id243" draw:style-name="a1016" draw:name="Text 23">
          <svg:title/>
          <svg:desc/>
          <text:p text:style-name="a1015" text:class-names="" text:cond-style-name=""><text:span text:style-name="a1013" text:class-names="">4</text:span><text:span text:style-name="a10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in" svg:y="4.57in" svg:width="3.75in" svg:height="0.42in" draw:id="id244" draw:style-name="a1020" draw:name="Text 24">
          <svg:title/>
          <svg:desc/>
          <text:p text:style-name="a1019" text:class-names="" text:cond-style-name=""><text:span text:style-name="a1017" text:class-names="">Campañas dirigidas a población vulnerable (mayores, niños, EPOC)</text:span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5.15in" svg:width="4.3in" svg:height="0.3in" draw:id="id245" draw:style-name="a1024" draw:name="Text 25">
          <svg:title/>
          <svg:desc/>
          <text:p text:style-name="a1023" text:class-names="" text:cond-style-name=""><text:span text:style-name="a1021" text:class-names="">Ventaja: intervención selectiva, solo en días de riesgo → mayor eficiencia y menor coste social</text:span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30">
          <draw:page-thumbnail draw:page-number="11" svg:x="0in" svg:y="0in" svg:width="0in" svg:height="0in" presentation:class="page" draw:id="id246" presentation:style-name="a1025" draw:name="Slide Image Placeholder 1">
            <svg:title/>
            <svg:desc/>
          </draw:page-thumbnail>
          <draw:frame draw:id="id247" presentation:style-name="a1026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248" presentation:style-name="a1029" draw:name="Slide Number Placeholder 3" svg:x="0in" svg:y="0in" svg:width="0in" svg:height="0in" presentation:class="page-number" presentation:placeholder="false">
            <draw:text-box>
              <text:p text:style-name="a1028" text:class-names="" text:cond-style-name=""><text:span text:style-name="a1027" text:class-names=""><text:page-number style:num-format="1" text:fixed="false">11</text:page-number></text:span></text:p>
            </draw:text-box>
            <svg:title/>
            <svg:desc/>
          </draw:frame>
        </presentation:notes>
      </draw:page>
      <draw:page draw:name="Slide 11" draw:style-name="a1031" draw:master-page-name="Master1-Layout1-cust-DEFAULT" presentation:presentation-page-layout-name="Master1-PPL1" draw:id="Slide-266">
        <draw:custom-shape svg:x="9.3in" svg:y="5.2in" svg:width="0.5in" svg:height="0.25in" draw:id="id249" draw:style-name="a1034" draw:name="Text 0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8in" svg:width="1.4in" svg:height="0.28in" draw:id="id250" draw:style-name="a1037" draw:name="Shape 1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27in" svg:width="1.4in" svg:height="0.28in" draw:id="id251" draw:style-name="a1041" draw:name="Text 2">
          <svg:title/>
          <svg:desc/>
          <text:p text:style-name="a1040" text:class-names="" text:cond-style-name=""><text:span text:style-name="a1038" text:class-names="">05 · CONCLUSIONES</text:span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65in" svg:width="9in" svg:height="0.55in" draw:id="id252" draw:style-name="a1045" draw:name="Text 3">
          <svg:title/>
          <svg:desc/>
          <text:p text:style-name="a1044" text:class-names="" text:cond-style-name=""><text:span text:style-name="a1042" text:class-names="">Comparativa de medidas propuestas</text:span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2in" svg:width="3in" svg:height="0.38in" draw:id="id253" draw:style-name="a1048" draw:name="Shape 4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1.2in" svg:width="2.95in" svg:height="0.38in" draw:id="id254" draw:style-name="a1052" draw:name="Text 5">
          <svg:title/>
          <svg:desc/>
          <text:p text:style-name="a1051" text:class-names="" text:cond-style-name=""><text:span text:style-name="a1049" text:class-names="">Medida</text:span><text:span text:style-name="a1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in" svg:y="1.2in" svg:width="0.9in" svg:height="0.38in" draw:id="id255" draw:style-name="a1055" draw:name="Shape 6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1.2in" svg:width="0.85in" svg:height="0.38in" draw:id="id256" draw:style-name="a1059" draw:name="Text 7">
          <svg:title/>
          <svg:desc/>
          <text:p text:style-name="a1058" text:class-names="" text:cond-style-name=""><text:span text:style-name="a1056" text:class-names="">Coste</text:span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in" svg:y="1.2in" svg:width="1.1in" svg:height="0.38in" draw:id="id257" draw:style-name="a1062" draw:name="Shape 8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in" svg:y="1.2in" svg:width="1.05in" svg:height="0.38in" draw:id="id258" draw:style-name="a1066" draw:name="Text 9">
          <svg:title/>
          <svg:desc/>
          <text:p text:style-name="a1065" text:class-names="" text:cond-style-name=""><text:span text:style-name="a1063" text:class-names="">Viabilidad</text:span><text:span text:style-name="a10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1.2in" svg:width="2.2in" svg:height="0.38in" draw:id="id259" draw:style-name="a1069" draw:name="Shape 10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1.2in" svg:width="2.15in" svg:height="0.38in" draw:id="id260" draw:style-name="a1073" draw:name="Text 11">
          <svg:title/>
          <svg:desc/>
          <text:p text:style-name="a1072" text:class-names="" text:cond-style-name=""><text:span text:style-name="a1070" text:class-names="">Resultado PM2.5</text:span><text:span text:style-name="a10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in" svg:y="1.2in" svg:width="1.5in" svg:height="0.38in" draw:id="id261" draw:style-name="a1076" draw:name="Shape 12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in" svg:y="1.2in" svg:width="1.45in" svg:height="0.38in" draw:id="id262" draw:style-name="a1080" draw:name="Text 13">
          <svg:title/>
          <svg:desc/>
          <text:p text:style-name="a1079" text:class-names="" text:cond-style-name=""><text:span text:style-name="a1077" text:class-names="">Muertes evit./año*</text:span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62in" svg:width="0.08in" svg:height="0.58in" draw:id="id263" draw:style-name="a1083" draw:name="Shape 14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62in" svg:width="3in" svg:height="0.58in" draw:id="id264" draw:style-name="a1086" draw:name="Shape 15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1.64in" svg:width="2.9in" svg:height="0.54in" draw:id="id265" draw:style-name="a1093" draw:name="Text 16">
          <svg:title/>
          <svg:desc/>
          <text:p text:style-name="a1089" text:class-names="" text:cond-style-name=""><text:span text:style-name="a1087" text:class-names="">Protocolo meteorológico</text:span><text:span text:style-name="a1088" text:class-names=""/></text:p>
          <text:p text:style-name="a1092" text:class-names="" text:cond-style-name=""><text:span text:style-name="a1090" text:class-names="">(baja dispersión)</text:span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in" svg:y="1.62in" svg:width="0.9in" svg:height="0.58in" draw:id="id266" draw:style-name="a1096" draw:name="Shape 17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1.64in" svg:width="0.8in" svg:height="0.54in" draw:id="id267" draw:style-name="a1100" draw:name="Text 18">
          <svg:title/>
          <svg:desc/>
          <text:p text:style-name="a1099" text:class-names="" text:cond-style-name=""><text:span text:style-name="a1097" text:class-names="">Medio</text:span><text:span text:style-name="a10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in" svg:y="1.62in" svg:width="1.1in" svg:height="0.58in" draw:id="id268" draw:style-name="a1103" draw:name="Shape 19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in" svg:y="1.64in" svg:width="1in" svg:height="0.54in" draw:id="id269" draw:style-name="a1107" draw:name="Text 20">
          <svg:title/>
          <svg:desc/>
          <text:p text:style-name="a1106" text:class-names="" text:cond-style-name=""><text:span text:style-name="a1104" text:class-names="">Alta</text:span><text:span text:style-name="a1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1.62in" svg:width="2.2in" svg:height="0.58in" draw:id="id270" draw:style-name="a1110" draw:name="Shape 21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1.64in" svg:width="2.1in" svg:height="0.54in" draw:id="id271" draw:style-name="a1114" draw:name="Text 22">
          <svg:title/>
          <svg:desc/>
          <text:p text:style-name="a1113" text:class-names="" text:cond-style-name=""><text:span text:style-name="a1111" text:class-names="">−12.97 µg/m³ (−12.69%)</text:span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in" svg:y="1.62in" svg:width="1.5in" svg:height="0.58in" draw:id="id272" draw:style-name="a1117" draw:name="Shape 23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in" svg:y="1.64in" svg:width="1.4in" svg:height="0.54in" draw:id="id273" draw:style-name="a1121" draw:name="Text 24">
          <svg:title/>
          <svg:desc/>
          <text:p text:style-name="a1120" text:class-names="" text:cond-style-name=""><text:span text:style-name="a1118" text:class-names="">~7.162</text:span><text:span text:style-name="a1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24in" svg:width="0.08in" svg:height="0.58in" draw:id="id274" draw:style-name="a1124" draw:name="Shape 25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24in" svg:width="3in" svg:height="0.58in" draw:id="id275" draw:style-name="a1127" draw:name="Shape 26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2.26in" svg:width="2.9in" svg:height="0.54in" draw:id="id276" draw:style-name="a1131" draw:name="Text 27">
          <svg:title/>
          <svg:desc/>
          <text:p text:style-name="a1130" text:class-names="" text:cond-style-name=""><text:span text:style-name="a1128" text:class-names="">Restricción 18:00–20:00</text:span><text:span text:style-name="a1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in" svg:y="2.24in" svg:width="0.9in" svg:height="0.58in" draw:id="id277" draw:style-name="a1134" draw:name="Shape 28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2.26in" svg:width="0.8in" svg:height="0.54in" draw:id="id278" draw:style-name="a1138" draw:name="Text 29">
          <svg:title/>
          <svg:desc/>
          <text:p text:style-name="a1137" text:class-names="" text:cond-style-name=""><text:span text:style-name="a1135" text:class-names="">Medio</text:span><text:span text:style-name="a11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in" svg:y="2.24in" svg:width="1.1in" svg:height="0.58in" draw:id="id279" draw:style-name="a1141" draw:name="Shape 30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in" svg:y="2.26in" svg:width="1in" svg:height="0.54in" draw:id="id280" draw:style-name="a1145" draw:name="Text 31">
          <svg:title/>
          <svg:desc/>
          <text:p text:style-name="a1144" text:class-names="" text:cond-style-name=""><text:span text:style-name="a1142" text:class-names="">Alta</text:span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2.24in" svg:width="2.2in" svg:height="0.58in" draw:id="id281" draw:style-name="a1148" draw:name="Shape 32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2.26in" svg:width="2.1in" svg:height="0.54in" draw:id="id282" draw:style-name="a1152" draw:name="Text 33">
          <svg:title/>
          <svg:desc/>
          <text:p text:style-name="a1151" text:class-names="" text:cond-style-name=""><text:span text:style-name="a1149" text:class-names="">−8.10 µg/m³ (−14.36%)</text:span><text:span text:style-name="a11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in" svg:y="2.24in" svg:width="1.5in" svg:height="0.58in" draw:id="id283" draw:style-name="a1155" draw:name="Shape 34">
          <svg:title/>
          <svg:desc/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in" svg:y="2.26in" svg:width="1.4in" svg:height="0.54in" draw:id="id284" draw:style-name="a1159" draw:name="Text 35">
          <svg:title/>
          <svg:desc/>
          <text:p text:style-name="a1158" text:class-names="" text:cond-style-name=""><text:span text:style-name="a1156" text:class-names="">~8.106</text:span><text:span text:style-name="a11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86in" svg:width="0.08in" svg:height="0.58in" draw:id="id285" draw:style-name="a1162" draw:name="Shape 36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86in" svg:width="3in" svg:height="0.58in" draw:id="id286" draw:style-name="a1165" draw:name="Shape 37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2.88in" svg:width="2.9in" svg:height="0.54in" draw:id="id287" draw:style-name="a1169" draw:name="Text 38">
          <svg:title/>
          <svg:desc/>
          <text:p text:style-name="a1168" text:class-names="" text:cond-style-name=""><text:span text:style-name="a1166" text:class-names="">Restricción 7:00–9:00</text:span><text:span text:style-name="a11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in" svg:y="2.86in" svg:width="0.9in" svg:height="0.58in" draw:id="id288" draw:style-name="a1172" draw:name="Shape 39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2.88in" svg:width="0.8in" svg:height="0.54in" draw:id="id289" draw:style-name="a1176" draw:name="Text 40">
          <svg:title/>
          <svg:desc/>
          <text:p text:style-name="a1175" text:class-names="" text:cond-style-name=""><text:span text:style-name="a1173" text:class-names="">Medio</text:span><text:span text:style-name="a1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in" svg:y="2.86in" svg:width="1.1in" svg:height="0.58in" draw:id="id290" draw:style-name="a1179" draw:name="Shape 41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in" svg:y="2.88in" svg:width="1in" svg:height="0.54in" draw:id="id291" draw:style-name="a1183" draw:name="Text 42">
          <svg:title/>
          <svg:desc/>
          <text:p text:style-name="a1182" text:class-names="" text:cond-style-name=""><text:span text:style-name="a1180" text:class-names="">Alta</text:span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2.86in" svg:width="2.2in" svg:height="0.58in" draw:id="id292" draw:style-name="a1186" draw:name="Shape 43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2.88in" svg:width="2.1in" svg:height="0.54in" draw:id="id293" draw:style-name="a1190" draw:name="Text 44">
          <svg:title/>
          <svg:desc/>
          <text:p text:style-name="a1189" text:class-names="" text:cond-style-name=""><text:span text:style-name="a1187" text:class-names="">−10.03 µg/m³ (−12.85%)</text:span><text:span text:style-name="a11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in" svg:y="2.86in" svg:width="1.5in" svg:height="0.58in" draw:id="id294" draw:style-name="a1193" draw:name="Shape 45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in" svg:y="2.88in" svg:width="1.4in" svg:height="0.54in" draw:id="id295" draw:style-name="a1197" draw:name="Text 46">
          <svg:title/>
          <svg:desc/>
          <text:p text:style-name="a1196" text:class-names="" text:cond-style-name=""><text:span text:style-name="a1194" text:class-names="">~7.660</text:span><text:span text:style-name="a11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48in" svg:width="0.08in" svg:height="0.58in" draw:id="id296" draw:style-name="a1200" draw:name="Shape 47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48in" svg:width="3in" svg:height="0.58in" draw:id="id297" draw:style-name="a1203" draw:name="Shape 48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3.5in" svg:width="2.9in" svg:height="0.54in" draw:id="id298" draw:style-name="a1207" draw:name="Text 49">
          <svg:title/>
          <svg:desc/>
          <text:p text:style-name="a1206" text:class-names="" text:cond-style-name=""><text:span text:style-name="a1204" text:class-names="">Restricción 9:00–11:00</text:span><text:span text:style-name="a1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in" svg:y="3.48in" svg:width="0.9in" svg:height="0.58in" draw:id="id299" draw:style-name="a1210" draw:name="Shape 50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3.5in" svg:width="0.8in" svg:height="0.54in" draw:id="id300" draw:style-name="a1214" draw:name="Text 51">
          <svg:title/>
          <svg:desc/>
          <text:p text:style-name="a1213" text:class-names="" text:cond-style-name=""><text:span text:style-name="a1211" text:class-names="">Medio</text:span><text:span text:style-name="a1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in" svg:y="3.48in" svg:width="1.1in" svg:height="0.58in" draw:id="id301" draw:style-name="a1217" draw:name="Shape 52">
          <svg:title/>
          <svg:desc/>
          <text:p text:style-name="a1216" text:class-names="" text:cond-style-name=""><text:span text:style-name="a12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in" svg:y="3.5in" svg:width="1in" svg:height="0.54in" draw:id="id302" draw:style-name="a1221" draw:name="Text 53">
          <svg:title/>
          <svg:desc/>
          <text:p text:style-name="a1220" text:class-names="" text:cond-style-name=""><text:span text:style-name="a1218" text:class-names="">Alta</text:span><text:span text:style-name="a1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3.48in" svg:width="2.2in" svg:height="0.58in" draw:id="id303" draw:style-name="a1224" draw:name="Shape 54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3.5in" svg:width="2.1in" svg:height="0.54in" draw:id="id304" draw:style-name="a1228" draw:name="Text 55">
          <svg:title/>
          <svg:desc/>
          <text:p text:style-name="a1227" text:class-names="" text:cond-style-name=""><text:span text:style-name="a1225" text:class-names="">−9.54 µg/m³ (−12.19%)</text:span><text:span text:style-name="a12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in" svg:y="3.48in" svg:width="1.5in" svg:height="0.58in" draw:id="id305" draw:style-name="a1231" draw:name="Shape 56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in" svg:y="3.5in" svg:width="1.4in" svg:height="0.54in" draw:id="id306" draw:style-name="a1235" draw:name="Text 57">
          <svg:title/>
          <svg:desc/>
          <text:p text:style-name="a1234" text:class-names="" text:cond-style-name=""><text:span text:style-name="a1232" text:class-names="">~6.880</text:span><text:span text:style-name="a1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1in" svg:width="0.08in" svg:height="0.58in" draw:id="id307" draw:style-name="a1238" draw:name="Shape 58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1in" svg:width="3in" svg:height="0.58in" draw:id="id308" draw:style-name="a1241" draw:name="Shape 59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4.12in" svg:width="2.9in" svg:height="0.54in" draw:id="id309" draw:style-name="a1245" draw:name="Text 60">
          <svg:title/>
          <svg:desc/>
          <text:p text:style-name="a1244" text:class-names="" text:cond-style-name=""><text:span text:style-name="a1242" text:class-names="">App alertas ciudadanas</text:span><text:span text:style-name="a12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in" svg:y="4.1in" svg:width="0.9in" svg:height="0.58in" draw:id="id310" draw:style-name="a1248" draw:name="Shape 61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4.12in" svg:width="0.8in" svg:height="0.54in" draw:id="id311" draw:style-name="a1252" draw:name="Text 62">
          <svg:title/>
          <svg:desc/>
          <text:p text:style-name="a1251" text:class-names="" text:cond-style-name=""><text:span text:style-name="a1249" text:class-names="">Bajo</text:span><text:span text:style-name="a1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in" svg:y="4.1in" svg:width="1.1in" svg:height="0.58in" draw:id="id312" draw:style-name="a1255" draw:name="Shape 63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in" svg:y="4.12in" svg:width="1in" svg:height="0.54in" draw:id="id313" draw:style-name="a1259" draw:name="Text 64">
          <svg:title/>
          <svg:desc/>
          <text:p text:style-name="a1258" text:class-names="" text:cond-style-name=""><text:span text:style-name="a1256" text:class-names="">Muy alta</text:span><text:span text:style-name="a12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4.1in" svg:width="2.2in" svg:height="0.58in" draw:id="id314" draw:style-name="a1262" draw:name="Shape 65">
          <svg:title/>
          <svg:desc/>
          <text:p text:style-name="a1261" text:class-names="" text:cond-style-name=""><text:span text:style-name="a12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4.12in" svg:width="2.1in" svg:height="0.54in" draw:id="id315" draw:style-name="a1266" draw:name="Text 66">
          <svg:title/>
          <svg:desc/>
          <text:p text:style-name="a1265" text:class-names="" text:cond-style-name=""><text:span text:style-name="a1263" text:class-names="">No cuantificado</text:span><text:span text:style-name="a12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in" svg:y="4.1in" svg:width="1.5in" svg:height="0.58in" draw:id="id316" draw:style-name="a1269" draw:name="Shape 67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in" svg:y="4.12in" svg:width="1.4in" svg:height="0.54in" draw:id="id317" draw:style-name="a1273" draw:name="Text 68">
          <svg:title/>
          <svg:desc/>
          <text:p text:style-name="a1272" text:class-names="" text:cond-style-name=""><text:span text:style-name="a1270" text:class-names="">—</text:span><text:span text:style-name="a1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72in" svg:width="0.08in" svg:height="0.58in" draw:id="id318" draw:style-name="a1276" draw:name="Shape 69">
          <svg:title/>
          <svg:desc/>
          <text:p text:style-name="a1275" text:class-names="" text:cond-style-name=""><text:span text:style-name="a1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72in" svg:width="3in" svg:height="0.58in" draw:id="id319" draw:style-name="a1279" draw:name="Shape 70">
          <svg:title/>
          <svg:desc/>
          <text:p text:style-name="a1278" text:class-names="" text:cond-style-name=""><text:span text:style-name="a1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4.74in" svg:width="2.9in" svg:height="0.54in" draw:id="id320" draw:style-name="a1283" draw:name="Text 71">
          <svg:title/>
          <svg:desc/>
          <text:p text:style-name="a1282" text:class-names="" text:cond-style-name=""><text:span text:style-name="a1280" text:class-names="">Peaje urbano estructural</text:span><text:span text:style-name="a1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in" svg:y="4.72in" svg:width="0.9in" svg:height="0.58in" draw:id="id321" draw:style-name="a1286" draw:name="Shape 72">
          <svg:title/>
          <svg:desc/>
          <text:p text:style-name="a1285" text:class-names="" text:cond-style-name=""><text:span text:style-name="a12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4.74in" svg:width="0.8in" svg:height="0.54in" draw:id="id322" draw:style-name="a1290" draw:name="Text 73">
          <svg:title/>
          <svg:desc/>
          <text:p text:style-name="a1289" text:class-names="" text:cond-style-name=""><text:span text:style-name="a1287" text:class-names="">Alto</text:span><text:span text:style-name="a1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in" svg:y="4.72in" svg:width="1.1in" svg:height="0.58in" draw:id="id323" draw:style-name="a1293" draw:name="Shape 74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in" svg:y="4.74in" svg:width="1in" svg:height="0.54in" draw:id="id324" draw:style-name="a1297" draw:name="Text 75">
          <svg:title/>
          <svg:desc/>
          <text:p text:style-name="a1296" text:class-names="" text:cond-style-name=""><text:span text:style-name="a1294" text:class-names="">Media-baja</text:span><text:span text:style-name="a1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4.72in" svg:width="2.2in" svg:height="0.58in" draw:id="id325" draw:style-name="a1300" draw:name="Shape 76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4.74in" svg:width="2.1in" svg:height="0.54in" draw:id="id326" draw:style-name="a1304" draw:name="Text 77">
          <svg:title/>
          <svg:desc/>
          <text:p text:style-name="a1303" text:class-names="" text:cond-style-name=""><text:span text:style-name="a1301" text:class-names="">Alto potencial</text:span><text:span text:style-name="a1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in" svg:y="4.72in" svg:width="1.5in" svg:height="0.58in" draw:id="id327" draw:style-name="a1307" draw:name="Shape 78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in" svg:y="4.74in" svg:width="1.4in" svg:height="0.54in" draw:id="id328" draw:style-name="a1311" draw:name="Text 79">
          <svg:title/>
          <svg:desc/>
          <text:p text:style-name="a1310" text:class-names="" text:cond-style-name=""><text:span text:style-name="a1308" text:class-names="">N/E</text:span><text:span text:style-name="a1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5.28in" svg:width="9in" svg:height="0.28in" draw:id="id329" draw:style-name="a1315" draw:name="Text 80">
          <svg:title/>
          <svg:desc/>
          <text:p text:style-name="a1314" text:class-names="" text:cond-style-name=""><text:span text:style-name="a1312" text:class-names="">* Aproximaciones ilustrativas para mostrar orden de magnitud. No sumar entre medidas. Basadas en 56.443 muertes prematuras/año atribuibles a PM2.5 en Beijing.</text:span><text:span text:style-name="a1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21">
          <draw:page-thumbnail draw:page-number="12" svg:x="0in" svg:y="0in" svg:width="0in" svg:height="0in" presentation:class="page" draw:id="id330" presentation:style-name="a1316" draw:name="Slide Image Placeholder 1">
            <svg:title/>
            <svg:desc/>
          </draw:page-thumbnail>
          <draw:frame draw:id="id331" presentation:style-name="a1317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332" presentation:style-name="a1320" draw:name="Slide Number Placeholder 3" svg:x="0in" svg:y="0in" svg:width="0in" svg:height="0in" presentation:class="page-number" presentation:placeholder="false">
            <draw:text-box>
              <text:p text:style-name="a1319" text:class-names="" text:cond-style-name=""><text:span text:style-name="a1318" text:class-names=""><text:page-number style:num-format="1" text:fixed="false">12</text:page-number></text:span></text:p>
            </draw:text-box>
            <svg:title/>
            <svg:desc/>
          </draw:frame>
        </presentation:notes>
      </draw:page>
      <draw:page draw:name="Slide 12" draw:style-name="a1322" draw:master-page-name="Master1-Layout1-cust-DEFAULT" presentation:presentation-page-layout-name="Master1-PPL1" draw:id="Slide-267">
        <draw:custom-shape svg:x="9.3in" svg:y="5.2in" svg:width="0.5in" svg:height="0.25in" draw:id="id333" draw:style-name="a1325" draw:name="Text 0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0.35in" svg:height="5.625in" draw:id="id334" draw:style-name="a1328" draw:name="Shape 1">
          <svg:title/>
          <svg:desc/>
          <text:p text:style-name="a1327" text:class-names="" text:cond-style-name=""><text:span text:style-name="a13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0.3in" svg:width="9in" svg:height="0.55in" draw:id="id335" draw:style-name="a1332" draw:name="Text 2">
          <svg:title/>
          <svg:desc/>
          <text:p text:style-name="a1331" text:class-names="" text:cond-style-name=""><text:span text:style-name="a1329" text:class-names="">Conclusiones y priorización</text:span><text:span text:style-name="a13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1in" svg:width="0.5in" svg:height="0.55in" draw:id="id336" draw:style-name="a1335" draw:name="Shape 3">
          <svg:title/>
          <svg:desc/>
          <text:p text:style-name="a1334" text:class-names="" text:cond-style-name=""><text:span text:style-name="a1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1in" svg:width="0.5in" svg:height="0.55in" draw:id="id337" draw:style-name="a1339" draw:name="Text 4">
          <svg:title/>
          <svg:desc/>
          <text:p text:style-name="a1338" text:class-names="" text:cond-style-name=""><text:span text:style-name="a1336" text:class-names="">1</text:span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1.04in" svg:width="8.3in" svg:height="0.5in" draw:id="id338" draw:style-name="a1343" draw:name="Text 5">
          <svg:title/>
          <svg:desc/>
          <text:p text:style-name="a1342" text:class-names="" text:cond-style-name=""><text:span text:style-name="a1340" text:class-names="">Protocolo meteorológico de baja dispersión — mejor relación impacto/coste/aceptabilidad</text:span><text:span text:style-name="a13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1.88in" svg:width="0.5in" svg:height="0.55in" draw:id="id339" draw:style-name="a1346" draw:name="Shape 6">
          <svg:title/>
          <svg:desc/>
          <text:p text:style-name="a1345" text:class-names="" text:cond-style-name=""><text:span text:style-name="a1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1.88in" svg:width="0.5in" svg:height="0.55in" draw:id="id340" draw:style-name="a1350" draw:name="Text 7">
          <svg:title/>
          <svg:desc/>
          <text:p text:style-name="a1349" text:class-names="" text:cond-style-name=""><text:span text:style-name="a1347" text:class-names="">2</text:span><text:span text:style-name="a1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1.92in" svg:width="8.3in" svg:height="0.5in" draw:id="id341" draw:style-name="a1354" draw:name="Text 8">
          <svg:title/>
          <svg:desc/>
          <text:p text:style-name="a1353" text:class-names="" text:cond-style-name=""><text:span text:style-name="a1351" text:class-names="">Restricción horaria 18:00–20:00 (máx. reducción relativa) o 7:00–9:00 (máx. reducción absoluta)</text:span><text:span text:style-name="a13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76in" svg:width="0.5in" svg:height="0.55in" draw:id="id342" draw:style-name="a1357" draw:name="Shape 9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76in" svg:width="0.5in" svg:height="0.55in" draw:id="id343" draw:style-name="a1361" draw:name="Text 10">
          <svg:title/>
          <svg:desc/>
          <text:p text:style-name="a1360" text:class-names="" text:cond-style-name=""><text:span text:style-name="a1358" text:class-names="">3</text:span><text:span text:style-name="a13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2.8in" svg:width="8.3in" svg:height="0.5in" draw:id="id344" draw:style-name="a1365" draw:name="Text 11">
          <svg:title/>
          <svg:desc/>
          <text:p text:style-name="a1364" text:class-names="" text:cond-style-name=""><text:span text:style-name="a1362" text:class-names="">Teletrabajo parcial, horarios escalonados y app municipal de alertas — medidas complementarias sin fricción</text:span><text:span text:style-name="a1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64in" svg:width="0.5in" svg:height="0.55in" draw:id="id345" draw:style-name="a1368" draw:name="Shape 12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64in" svg:width="0.5in" svg:height="0.55in" draw:id="id346" draw:style-name="a1372" draw:name="Text 13">
          <svg:title/>
          <svg:desc/>
          <text:p text:style-name="a1371" text:class-names="" text:cond-style-name=""><text:span text:style-name="a1369" text:class-names="">4</text:span><text:span text:style-name="a1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3.68in" svg:width="8.3in" svg:height="0.5in" draw:id="id347" draw:style-name="a1376" draw:name="Text 14">
          <svg:title/>
          <svg:desc/>
          <text:p text:style-name="a1375" text:class-names="" text:cond-style-name=""><text:span text:style-name="a1373" text:class-names="">Restricción progresiva del tráfico — escenario piloto moderado, evaluar antes de ampliar</text:span><text:span text:style-name="a1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52in" svg:width="0.5in" svg:height="0.55in" draw:id="id348" draw:style-name="a1379" draw:name="Shape 15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4.52in" svg:width="0.5in" svg:height="0.55in" draw:id="id349" draw:style-name="a1383" draw:name="Text 16">
          <svg:title/>
          <svg:desc/>
          <text:p text:style-name="a1382" text:class-names="" text:cond-style-name=""><text:span text:style-name="a1380" text:class-names="">5</text:span><text:span text:style-name="a1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4.56in" svg:width="8.3in" svg:height="0.5in" draw:id="id350" draw:style-name="a1387" draw:name="Text 17">
          <svg:title/>
          <svg:desc/>
          <text:p text:style-name="a1386" text:class-names="" text:cond-style-name=""><text:span text:style-name="a1384" text:class-names="">Peaje urbano estructural — fase posterior, mayor complejidad técnica e institucional</text:span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5.1344in" svg:width="9in" svg:height="0.4in" draw:id="id351" draw:style-name="a1390" draw:name="Shape 18">
          <svg:title/>
          <svg:desc/>
          <text:p text:style-name="a1389" text:class-names="" text:cond-style-name=""><text:span text:style-name="a1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in" svg:y="5.1544in" svg:width="8.9in" svg:height="0.36in" draw:id="id352" draw:style-name="a1394" draw:name="Text 19">
          <svg:title/>
          <svg:desc/>
          <text:p text:style-name="a1393" text:class-names="" text:cond-style-name=""><text:span text:style-name="a1391" text:class-names="">No una prohibición indiscriminada, sino una política escalonada, inteligente y evaluable</text:span><text:span text:style-name="a1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00">
          <draw:page-thumbnail draw:page-number="13" svg:x="0in" svg:y="0in" svg:width="0in" svg:height="0in" presentation:class="page" draw:id="id353" presentation:style-name="a1395" draw:name="Slide Image Placeholder 1">
            <svg:title/>
            <svg:desc/>
          </draw:page-thumbnail>
          <draw:frame draw:id="id354" presentation:style-name="a1396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355" presentation:style-name="a1399" draw:name="Slide Number Placeholder 3" svg:x="0in" svg:y="0in" svg:width="0in" svg:height="0in" presentation:class="page-number" presentation:placeholder="false">
            <draw:text-box>
              <text:p text:style-name="a1398" text:class-names="" text:cond-style-name=""><text:span text:style-name="a1397" text:class-names=""><text:page-number style:num-format="1" text:fixed="false">13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EFAULT"/>
    <style:presentation-page-layout style:name="Master1-PPL2" style:display-name="Title slide">
      <presentation:placeholder presentation:object="title" svg:x="3.32972in" svg:y="1.57946in" svg:width="3.34055in" svg:height="1.6811in"/>
      <presentation:placeholder presentation:object="subtitle" svg:x="3.32972in" svg:y="3.40833in" svg:width="3.34055in" svg:height="0.76706in"/>
      <presentation:placeholder presentation:object="page-number" svg:x="9.26559in" svg:y="5.09976in" svg:width="0.60007in" svg:height="0.43045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5.625in" fo:page-height="10in" style:print-orientation="portrait" style:register-truth-ref-style-name=""/>
    </style:page-layout>
    <style:page-layout style:name="pageLayout3">
      <style:page-layout-properties fo:page-width="5.625in" fo:page-height="10in" style:print-orientation="portrait" style:register-truth-ref-style-name=""/>
    </style:page-layout>
    <style:style style:family="presentation" style:name="a2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e7e6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e7e6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presentation:notes style:page-layout-name="pageLayout2" draw:style-name="a1"/>
    </style:master-page>
    <style:master-page style:name="Master1-Layout1-cust-DEFAULT" style:page-layout-name="pageLayout1" draw:style-name="a2">
      <presentation:notes style:page-layout-name="pageLayout2" draw:style-name="a3"/>
    </style:master-page>
    <style:master-page style:name="Master1-Layout2-title-Title-slide" style:page-layout-name="pageLayout1" draw:style-name="a4">
      <draw:custom-shape svg:x="3.00089in" svg:y="0.82754in" svg:width="1.18288in" svg:height="1.23026in" draw:id="id0" draw:style-name="a7" draw:name="Google Shape;10;p2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43265 44998" draw:enhanced-path="M 0 44998 L 0 0 43265 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265"/>
          <draw:equation draw:name="f7" draw:formula="?f4 / 449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1.18288in" svg:height="1.23026in" draw:id="id1" draw:style-name="a10" draw:transform="translate(-0.59144in -0.61513in) rotate(-3.14159) translate(6.40766in 4.18766in)" draw:name="Google Shape;11;p2">
        <svg:title/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43265 44998" draw:enhanced-path="M 0 44998 L 0 0 43265 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265"/>
          <draw:equation draw:name="f7" draw:formula="?f4 / 449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" presentation:style-name="a13" draw:name="Google Shape;12;p2" svg:x="3.32972in" svg:y="1.57946in" svg:width="3.34055in" svg:height="1.6811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3" presentation:style-name="a16" draw:name="Google Shape;13;p2" svg:x="3.32972in" svg:y="3.40833in" svg:width="3.34055in" svg:height="0.76706in" presentation:class="subtitle" presentation:placeholder="false">
        <draw:text-box>
          <text:p text:style-name="a15" text:class-names="" text:cond-style-name=""><text:span text:style-name="a14" text:class-names=""/></text:p>
        </draw:text-box>
        <svg:title/>
        <svg:desc/>
      </draw:frame>
      <draw:frame draw:id="id4" presentation:style-name="a20" draw:name="Google Shape;14;p2" svg:x="9.26559in" svg:y="5.09976in" svg:width="0.60007in" svg:height="0.43045in" presentation:class="page-number" presentation:placeholder="false">
        <draw:text-box>
          <text:p text:style-name="a19" text:class-names="" text:cond-style-name=""><text:span text:style-name="a17" text:class-names=""><text:page-number style:num-format="1" text:fixed="false">‹#›</text:page-number></text:span><text:span text:style-name="a18" text:class-names=""/></text:p>
        </draw:text-box>
        <svg:title/>
        <svg:desc/>
      </draw:frame>
      <presentation:notes style:page-layout-name="pageLayout2" draw:style-name="a21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nálisis Calidad del Aire — Beijing 2013–2017</dc:title>
    <dc:subject>PptxGenJS Presentation</dc:subject>
    <meta:initial-creator>Equipo de Análisis</meta:initial-creator>
    <meta:creation-date>2026-03-15T19:56:54Z</meta:creation-date>
    <dc:date>2026-03-17T17:52:57Z</dc:date>
    <meta:editing-cycles>2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4748b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4748b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389in" svg:stroke-color="#e2e8f0" svg:stroke-opacity="100%" draw:stroke-linejoin="round" svg:stroke-linecap="butt"/>
    </style:style>
    <style:style style:family="chart" style:name="G0S0" style:data-style-name="N3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9bb4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d1b2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ignore"/>
      <style:graphic-properties draw:fill="solid" draw:fill-color="#f8fafc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0.8pt" svg:width="396.0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M2.5 original</text:p>
              </table:table-cell>
              <table:table-cell office:value-type="string">
                <text:p>PM2.5 tras −10% tráfico</text:p>
              </table:table-cell>
            </table:table-row>
          </table:table-header-rows>
          <table:table-row>
            <table:table-cell office:value-type="string">
              <text:p>9–11h</text:p>
            </table:table-cell>
            <table:table-cell office:value-type="float" office:value="78.3"/>
            <table:table-cell office:value-type="float" office:value="68.8"/>
          </table:table-row>
          <table:table-row>
            <table:table-cell office:value-type="string">
              <text:p>7–9h</text:p>
            </table:table-cell>
            <table:table-cell office:value-type="float" office:value="82.4"/>
            <table:table-cell office:value-type="float" office:value="72.400000000000006"/>
          </table:table-row>
          <table:table-row>
            <table:table-cell office:value-type="string">
              <text:p>18–20h</text:p>
            </table:table-cell>
            <table:table-cell office:value-type="float" office:value="56.4"/>
            <table:table-cell office:value-type="float" office:value="48.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1b3a5c" draw:opacity="100%" draw:stroke="none"/>
    </style:style>
    <style:style style:family="chart" style:name="G0S0P2">
      <style:graphic-properties draw:fill="solid" draw:fill-color="#0b7a75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4748b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4748b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2e8b57" draw:opacity="100%" draw:stroke="none"/>
    </style:style>
    <style:style style:family="chart" style:name="GMa1">
      <style:graphic-properties draw:fill="none" draw:stroke="solid" svg:stroke-width="0.01389in" svg:stroke-color="#e2e8f0" svg:stroke-opacity="100%" draw:stroke-linejoin="round" svg:stroke-linecap="butt"/>
    </style:style>
    <style:style style:family="chart" style:name="G0S0" style:data-style-name="N3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9bb4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ignore"/>
      <style:graphic-properties draw:fill="solid" draw:fill-color="#f8fafc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3.6pt" svg:width="417.6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ducción PM2.5 (µg/m³)</text:p>
              </table:table-cell>
            </table:table-row>
          </table:table-header-rows>
          <table:table-row>
            <table:table-cell office:value-type="string">
              <text:p>Escenario
base</text:p>
            </table:table-cell>
            <table:table-cell office:value-type="float" office:value="75.8"/>
          </table:table-row>
          <table:table-row>
            <table:table-cell office:value-type="string">
              <text:p>−10%
tráfico</text:p>
            </table:table-cell>
            <table:table-cell office:value-type="float" office:value="65.900000000000006"/>
          </table:table-row>
          <table:table-row>
            <table:table-cell office:value-type="string">
              <text:p>−20%
tráfico</text:p>
            </table:table-cell>
            <table:table-cell office:value-type="float" office:value="56"/>
          </table:table-row>
          <table:table-row>
            <table:table-cell office:value-type="string">
              <text:p>−30%
tráfico</text:p>
            </table:table-cell>
            <table:table-cell office:value-type="float" office:value="46.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